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style:contextual-spacing="false" fo:line-height="115%"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2" style:family="paragraph" style:parent-style-name="Standard">
      <style:paragraph-properties fo:margin-top="0cm" fo:margin-bottom="0.353cm" style:contextual-spacing="false" fo:line-height="115%" fo:text-align="start" style:justify-single-word="false"/>
      <style:text-properties officeooo:paragraph-rsid="0002d91b"/>
    </style:style>
    <style:style style:name="T1" style:family="text">
      <style:text-properties style:use-window-font-color="true" loext:opacity="0%" style:font-name="Calibri1" fo:font-size="11pt" fo:font-weight="normal" fo:background-color="transparent" loext:char-shading-value="0"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ies</text:p>
      <text:p text:style-name="P1">El Sol en Aries marca el inicio del año astrológico, dotando a los nativos de una energía vibrante, pionera y sumamente competitiva. Al ser un signo de fuego gobernado por Marte, la iniciativa es su mayor virtud. Los arianos no esperan a que las cosas sucedan; ellos hacen que ocurran con valentía y un entusiasmo contagioso. Poseen un espíritu independiente, un liderazgo natural y una honestidad brutal que a veces puede confundirse con falta de tacto.</text:p>
      <text:p text:style-name="P1"/>
      <text:p text:style-name="P1">Su motor principal es el desafío. Se crecen ante las dificultades y disfrutan siendo los primeros en explorar nuevos territorios, ya sea en el ámbito profesional o personal. Sin embargo, su impaciencia es su gran talón de Aquiles. Les cuesta mantener la constancia una vez que la novedad inicial se ha desvanecido, y su temperamento puede ser explosivo, aunque afortunadamente no suelen guardar rencor por mucho tiempo.</text:p>
      <text:p text:style-name="P1"/>
      <text:p text:style-name="P1">En el amor y las relaciones, son apasionados, directos y protectores, buscando siempre una dinámica estimulante y activa. Para brillar en su máxima expresión, Aries debe aprender a canalizar su enorme fuerza vital, desarrollando la paciencia y la perseverancia. Cuando logran dominar su impulsividad, se convierten en líderes extraordinarios capaces de inspirar a otros a romper barreras y alcanzar metas que parecían totalmente imposibles.</text:p>
      <text:p text:style-name="P1"/>
      <text:p text:style-name="P1">Tauro</text:p>
      <text:p text:style-name="P1">El Sol en Tauro, signo de tierra regido por Venus, aporta una energía de estabilidad, paciencia y un profundo vínculo con el mundo material y sensorial. Los nativos de este signo destacan por su naturaleza práctica, su increíble resistencia y una lealtad inquebrantable hacia sus seres queridos. Buscan la seguridad en todas las facetas de su vida, construyendo sus proyectos paso a paso sobre bases sólidas y realistas.</text:p>
      <text:p text:style-name="P1"/>
      <text:p text:style-name="P1">Tauro posee una conexión especial con los placeres de la vida: el arte, la buena comida, la música y la naturaleza. Tienen un ritmo pausado pero constante; no les gustan las prisas ni los cambios abruptos, lo que a menudo se traduce en una notable terquedad. Cuando un taurino toma una decisión, es sumamente difícil hacerle cambiar de opinión, ya que confía plenamente en su propio criterio y en su lógica pragmática.</text:p>
      <text:p text:style-name="P1"/>
      <text:p text:style-name="P1">En el ámbito laboral, son trabajadores incansables, sumamente confiables y excelentes administradores de recursos. En el plano afectivo, son protectores, afectuosos y sumamente posesivos, buscando relaciones duraderas basadas en la confianza mutua. El gran aprendizaje para el Sol en Tauro radica en aprender a soltar el control y aceptar la impermanencia de las cosas, entendiendo que el cambio también trae crecimiento y renovación.</text:p>
      <text:p text:style-name="P1"/>
      <text:p text:style-name="P1">Géminis</text:p>
      <text:p text:style-name="P1"><text:soft-page-break/>El Sol en Géminis, signo de aire gobernado por Mercurio, dota a los individuos de una mente ágil, una curiosidad insaciable y una extraordinaria capacidad para la comunicación. Los geminianos son los eternos estudiantes del zodiaco; les fascina recopilar información, conectar ideas y compartir sus conocimientos con el entorno. Su personalidad es versátil, adaptable, sumamente sociable y dotada de un ingenio y carisma natural que desarma a cualquiera.</text:p>
      <text:p text:style-name="P1"/>
      <text:p text:style-name="P1">La dualidad es su rasgo más característico, lo que les permite ver múltiples perspectivas de una misma situación simultáneamente. Esto los hace excelentes mediadores, aunque también puede generarles dudas, dispersión mental e inconstancia. Les aburre soberanamente la rutina, por lo que buscan constantemente estímulos intelectuales, viajes, conversaciones interesantes y nuevos pasatiempos que mantengan despierto su interés.</text:p>
      <text:p text:style-name="P1"/>
      <text:p text:style-name="P1">En sus relaciones, valoran la conexión mental y la libertad por encima de todo; necesitan una pareja que sea también un compañero de charlas y aventuras. Profesionalmente, brillan en el periodismo, la escritura, las ventas y la educación. Para alcanzar su máximo potencial, el Sol en Géminis debe aprender a enfocar su energía dispersa, profundizando en sus proyectos en lugar de quedarse únicamente en la superficie de las cosas.</text:p>
      <text:p text:style-name="P1"/>
      <text:p text:style-name="P1">Cáncer</text:p>
      <text:p text:style-name="P1">El Sol en Cáncer, signo de agua regido por la Luna, baña a sus nativos en un océano de sensibilidad, intuición y un profundo instinto protector. El hogar, la familia y las raíces emocionales son el eje central de su existencia. Los cancerianos poseen una empatía natural que les permite sintonizar con los sentimientos de los demás, convirtiéndolos en seres sumamente compasivos, afectuosos, cuidadores y leales.</text:p>
      <text:p text:style-name="P1"/>
      <text:p text:style-name="P1">Al estar gobernados por las fases lunares, su mundo emocional es sumamente cambiante y cíclico. Pueden pasar de la alegría a la melancolía con cierta facilidad, y tienden a replegarse dentro de su caparazón protector cuando se sienten vulnerables, heridos o incomprendidos por el entorno. Tienen una memoria emocional prodigiosa y un fuerte vínculo con el pasado, lo que a veces les dificulta soltar viejos rencores o situaciones superadas.</text:p>
      <text:p text:style-name="P1"/>
      <text:p text:style-name="P1">En el amor, buscan seguridad, intimidad y un compromiso real; entregan su corazón por completo y crean ambientes cálidos y acogedores. En el ámbito profesional, destacan en profesiones de ayuda, psicología, gastronomía o gestión comunitaria. El gran desafío para el Sol en Cáncer es establecer límites saludables, evitando asumir las cargas ajenas y aprendiendo a nutrirse a sí mismos tanto como nutren a los demás.</text:p>
      <text:p text:style-name="P1"/>
      <text:p text:style-name="P1">Leo</text:p>
      <text:p text:style-name="P1">El Sol en Leo se encuentra en su propio domicilio astrológico, lo que otorga a estos nativos una presencia magnética, una gran autoconfianza y una vitalidad desbordante. Al ser un signo de fuego, Leo irradia <text:soft-page-break/>calidez, generosidad, optimismo y un amor natural por la vida y el drama. Poseen un orgullo noble y un deseo innato de ser reconocidos, valorados y admirados por sus talentos y su autenticidad.</text:p>
      <text:p text:style-name="P1"/>
      <text:p text:style-name="P1">Los leoninos son líderes natos, creativos, expresivos y con un gran sentido de la lealtad. Les encanta el centro de atención y tienen un talento especial para inspirar y motivar a los demás con su entusiasmo. Sin embargo, su necesidad de validación externa puede derivar en egocentrismo, vanidad o una actitud dramática ante las críticas, ya que les cuesta aceptar que no siempre son el foco principal del universo.</text:p>
      <text:p text:style-name="P1"/>
      <text:p text:style-name="P1">En el amor, son sumamente apasionados, románticos, generosos y protectores con sus parejas. En el terreno profesional, brillan con luz propia en las artes escénicas, la dirección de empresas, la política y cualquier puesto que requiera visibilidad y liderazgo. El aprendizaje evolutivo para el Sol en Leo consiste en brillar desde el corazón, compartiendo su luz generosamente sin esperar el aplauso constante de los demás.</text:p>
      <text:p text:style-name="P1"/>
      <text:p text:style-name="P1">Virgo</text:p>
      <text:p text:style-name="P1">El Sol en Virgo, signo de tierra regido por Mercurio, confiere una mente analítica, una atención meticulosa al detalle y un profundo deseo de servicio y utilidad. Los nativos de este signo buscan el orden, la eficiencia y la perfección en todo lo que hacen. Son personas sumamente prácticas, realistas, trabajadoras, discretas y con un alto sentido de la responsabilidad y el deber.</text:p>
      <text:p text:style-name="P1"/>
      <text:p text:style-name="P1">Virgo tiene la capacidad única de descomponer problemas complejos en partes manejables, lo que los convierte en excelentes solucionadores de crisis y organizadores. Les preocupa mucho la salud, la higiene y el bienestar físico, adoptando a menudo hábitos de vida muy estructurados y saludables. Su espíritu crítico es agudo, pero suele aplicarse con mayor severidad hacia ellos mismos, cayendo con frecuencia en la autocrítica destructiva y la ansiedad por el control.</text:p>
      <text:p text:style-name="P1"/>
      <text:p text:style-name="P1">En las relaciones humanas, demuestran su afecto a través de actos prácticos de servicio y apoyo constante, prefiriendo los hechos a las grandes declaraciones románticas. En el ámbito laboral, son indispensables gracias a su precisión, lealtad y capacidad técnica. El desafío para el Sol en Virgo es aprender a relajar sus niveles de exigencia, aceptando las imperfecciones de la vida como parte del orden natural.</text:p>
      <text:p text:style-name="P1"/>
      <text:p text:style-name="P1">Libra</text:p>
      <text:p text:style-name="P1">El Sol en Libra, signo de aire gobernado por Venus, dota a los individuos de un refinado sentido de la belleza, la justicia, la diplomacia y la armonía social. Para Libra, la vida es una búsqueda constante de equilibrio y paz en todas sus relaciones y entornos. Son personas sociables, amables, encantadoras, con un tacto innato que les permite mediar en conflictos con gran facilidad.</text:p>
      <text:p text:style-name="P1"/>
      <text:p text:style-name="P1"><text:soft-page-break/>La balanza, su símbolo, refleja su necesidad de sopesar todas las opciones antes de actuar. Esta búsqueda de la decisión perfecta a menudo se traduce en una marcada indecisión, ya que temen romper la armonía o elegir la opción incorrecta. Detestan la rudeza, los conflictos y la injusticia, y buscan rodearse de ambientes estéticos, arte y conversaciones civilizadas.</text:p>
      <text:p text:style-name="P1"/>
      <text:p text:style-name="P1">El ámbito de la pareja es fundamental para su desarrollo; se conocen a sí mismos a través del reflejo en el otro, lo que a veces los lleva a complacer en exceso para evitar el rechazo. Profesionalmente, destacan en el derecho, las relaciones públicas, el arte y el diseño. El gran aprendizaje para el Sol en Libra consiste en desarrollar su propia individualidad, aprendiendo a decir "no" y a defender sus posturas sin temor a perder la aprobación de los demás.</text:p>
      <text:p text:style-name="P1"/>
      <text:p text:style-name="P1">Escorpio</text:p>
      <text:p text:style-name="P1">El Sol en Escorpio, signo de agua tradicionalmente regido por Marte y modernamente por Plutón, otorga una personalidad magnética, intensa, apasionada y profundamente transformadora. Los nativos de este signo poseen una intuición penetrante que les permite ver más allá de las apariencias, detectando las verdades ocultas, las motivaciones secretas y las debilidades del entorno humano con asombrosa facilidad.</text:p>
      <text:p text:style-name="P1"/>
      <text:p text:style-name="P1">Escorpio vive la vida en tonos absolutos; para ellos no existen las medias tintas. Poseen una fuerza de voluntad inquebrantable y una resiliencia emocional asombrosa que les permite renacer de sus propias cenizas tras crisis profundas. Son sumamente reservados, protectores de su intimidad y leales a muerte con quienes se ganan su confianza, la cual no otorgan con facilidad debido a su naturaleza inherentemente desconfiada.</text:p>
      <text:p text:style-name="P1"/>
      <text:p text:style-name="P1">Su intensidad puede manifestarse como un deseo de control, celos o una tendencia a guardar rencores profundos durante años. En el amor, buscan una fusión total, tanto espiritual como física, con su pareja. Profesionalmente, destacan en la investigación, la psicología, las finanzas estratégicas y la medicina. El desafío para el Sol en Escorpio es aprender a perdonar, soltar el control y canalizar su inmenso poder emocional hacia la sanación y la evolución espiritual.</text:p>
      <text:p text:style-name="P1"/>
      <text:p text:style-name="P1">Sagitario</text:p>
      <text:p text:style-name="P1">El Sol en Sagitario, signo de fuego gobernado por el benévolo Júpiter, infunde en sus nativos un optimismo inquebrantable, un amor profundo por la libertad y un espíritu aventurero sin límites. Los sagitarianos son los eternos buscadores de la verdad y el significado de la vida, guiados siempre por una fe ciega en el futuro y una curiosidad filosófica inagotable.</text:p>
      <text:p text:style-name="P1"/>
      <text:p text:style-name="P1">Su energía es expansiva, alegre, generosa y sumamente entusiasta. Les fascina viajar, explorar culturas extranjeras, estudiar diferentes filosofías y expandir constantemente sus horizontes mentales y físicos. Son conocidos por su honestidad directa y espontánea, que a veces raya en la falta de tacto, ya que dicen lo que <text:soft-page-break/>piensan sin filtros. Detestan sentirse atrapados por la rutina o las restricciones emocionales, defendiendo su independencia a toda costa.</text:p>
      <text:p text:style-name="P1"/>
      <text:p text:style-name="P1">En sus relaciones personales, buscan compañeros de viaje que compartan sus ansias de crecimiento y su amor por la aventura. En el trabajo, brillan en la enseñanza, el turismo, el comercio internacional y las leyes. El gran desafío existencial para el Sol en Sagitario consiste en aprender a conectar con los detalles de la realidad cotidiana, evitando el exceso de confianza, la exageración y la huida de las responsabilidades prácticas.</text:p>
      <text:p text:style-name="P1"/>
      <text:p text:style-name="P1">Capricornio</text:p>
      <text:p text:style-name="P1">El Sol en Capricornio, signo de tierra regido por el disciplinado Saturno, otorga una personalidad madura, ambiciosa, paciente y dotada de un sentido del deber excepcional. Los capricornianos están hechos para la resistencia; ven la vida como una montaña que deben escalar con esfuerzo, constancia y una planificación meticulosa para alcanzar la cima del éxito y la estabilidad.</text:p>
      <text:p text:style-name="P1"/>
      <text:p text:style-name="P1">Poseen un enfoque sumamente práctico, realista y pragmático de las cosas. Valoran la estructura, las tradiciones, el estatus social y el autorrespeto. Son trabajadores incansables, sumamente responsables y con un autocontrol emocional admirable que a menudo es confundido con frialdad o distanciamiento, aunque en realidad protegen un interior sensible bajo una armadura de seriedad.</text:p>
      <text:p text:style-name="P1"/>
      <text:p text:style-name="P1">En el amor, son sumamente cautelosos al principio, pero una vez que se comprometen, ofrecen una lealtad y estabilidad inquebrantables a largo plazo. Profesionalmente, están diseñados para el liderazgo, la administración, la política y la gestión de grandes proyectos a largo plazo. El aprendizaje espiritual para el Sol en Capricornio es comprender que el valor personal no depende únicamente de los logros externos, aprendiendo a disfrutar del presente y a relajar su rigurosa autoexigencia.</text:p>
      <text:p text:style-name="P1"/>
      <text:p text:style-name="P1">Acuario</text:p>
      <text:p text:style-name="P1">El Sol en Acuario, signo de aire regido tradicionalmente por Saturno y modernamente por Urano, confiere una mente innovadora, original, altruista y profundamente orientada hacia el futuro. Los acuarianos son los visionarios y revolucionarios del zodiaco; poseen un fuerte sentido de la individualidad y una necesidad imperiosa de romper con las normas establecidas que consideran obsoletas.</text:p>
      <text:p text:style-name="P1"/>
      <text:p text:style-name="P1">Su enfoque está puesto en el colectivo, la humanidad, el progreso social y las causas humanitarias. Valoran la libertad personal por encima de todo y defienden el derecho de cada individuo a ser auténtico y diferente. Son sumamente sociables, disfrutan del trabajo en equipo y de los grupos de amigos, aunque a nivel personal pueden mantener un desapego emocional que desconcierta a quienes buscan una intimidad convencional.</text:p>
      <text:p text:style-name="P1"><text:soft-page-break/></text:p>
      <text:p text:style-name="P1">Su mente es científica, objetiva, lógica y abierta a conceptos vanguardistas o tecnológicos. En sus relaciones amorosas, buscan una base sólida de amistad, respeto mutuo, libertad y afinidad intelectual. Profesionalmente, se destacan en la tecnología, la ciencia, el activismo social y las artes vanguardistas. El desafío para el Sol en Acuario es conectar de manera más profunda con su propio mundo emocional y con las necesidades individuales de las personas cercanas.</text:p>
      <text:p text:style-name="P1"/>
      <text:p text:style-name="P1">Piscis</text:p>
      <text:p text:style-name="P1">El Sol en Piscis, signo de agua gobernado tradicionalmente por Júpiter y modernamente por Neptuno, cierra el ciclo zodiacal aportando una naturaleza profundamente espiritual, mística, empática y sumamente creativa. Los nativos de Piscis poseen una sensibilidad tan aguda que absorben las energías y emociones del entorno como auténticas esponjas psíquicas, lo que les da una compasión universal ilimitada.</text:p>
      <text:p text:style-name="P1"/>
      <text:p text:style-name="P1">Viven a menudo entre el mundo de la realidad tangible y el universo de sus sueños, fantasías e imaginación desbordante. Poseen un talento artístico y una intuición prodigiosa que les permite comprender verdades sutiles inaccesibles para la lógica pura. Son almas románticas, abnegadas, generosas y propensas al autosacrificio por el bienestar de los demás, buscando siempre la unidad espiritual con el todo.</text:p>
      <text:p text:style-name="P1"/>
      <text:p text:style-name="P1">Esta falta de límites emocionales puede llevarlos a la confusión, la evasión de la realidad a través de fantasías o adicciones, y a asumir el rol de víctimas o salvadores. En el amor, se entregan de forma incondicional y mística. Destacan en las artes, la música, la psicología, la sanación y el misticismo. El gran desafío para el Sol en Piscis es aprender a enraizarse en el mundo material, estableciendo fronteras psíquicas saludables.<text:line-break/><text:line-break/>Luna en Aries</text:p>
      <text:p text:style-name="P1">La Luna en Aries reacciona ante el mundo de forma inmediata, apasionada e instintiva. Al ser el hogar de las emociones regido por el fuego marciano, los nativos experimentan sus sentimientos con una intensidad desbordante y una necesidad imperiosa de acción. No filtran lo que sienten; si están contentos, irradian entusiasmo, y si se sienten frustrados, lo manifiestan al instante con un temperamento explosivo pero efímero. Su seguridad emocional depende directamente de su independencia y de la capacidad para enfrentar desafíos por sí mismos. Detestan sentirse indefensos o limitados por el entorno. Poseen un espíritu pionero en el plano afectivo, siendo sumamente protectores y directos con las personas que aman. Sin embargo, su principal aprendizaje radica en dominar la impaciencia y la tendencia a aburrirse cuando la intensidad del inicio disminuye en las relaciones. Tienden a volcarse en dinámicas competitivas o discusiones para encender la chispa emocional. Cuando logran canalizar esta energía, demuestran un coraje emocional inquebrantable, una resiliencia asombrosa para recuperarse de cualquier crisis y una honestidad afectiva transparente que genera una profunda confianza en quienes los rodean, convirtiéndose en pilares de fuerza y motivación para su círculo más íntimo.</text:p>
      <text:p text:style-name="P1"/>
      <text:p text:style-name="P1">Luna en Tauro</text:p>
      <text:p text:style-name="P1"><text:soft-page-break/>La Luna se encuentra en exaltación en Tauro, lo que otorga una naturaleza emocional sumamente estable, serena, paciente y profundamente vinculada al plano físico y sensorial. Los nativos con esta posición buscan la seguridad a través de lo tangible: el hogar cómodo, la estabilidad económica, la buena comida y los vínculos afectivos duraderos. No son propensos a los arranques emocionales ni a las crisis existenciales; procesan sus sentimientos de forma lenta, rumiando cada situación antes de emitir una respuesta. Su paz interior está ligada a la rutina y a la previsibilidad, por lo que los cambios abruptos les generan un profundo malestar interno. Son sumamente afectuosos, protectores y leales, demostrando su amor a través de cuidados prácticos y regalos materiales. El gran desafío de esta Luna es la terquedad y la resistencia a soltar situaciones, relaciones o hábitos que ya no son sanos, cayendo con frecuencia en el apego posesivo por temor a la carencia. Cuando logran equilibrar este aspecto, se convierten en el refugio seguro de sus seres queridos, ofreciendo un soporte emocional inquebrantable, un sentido común admirable y una capacidad única para disfrutar de los placeres sencillos de la existencia con total plenitud.</text:p>
      <text:p text:style-name="P1"/>
      <text:p text:style-name="P1">Luna en Géminis</text:p>
      <text:p text:style-name="P1">La Luna en Géminis necesita canalizar, procesar y entender sus emociones a través del intelecto, la palabra y el análisis conceptual. Para estos nativos, sentir es sinónimo de comunicar; necesitan hablar, escribir o debatir sobre lo que les pasa internamente para poder asimilarlo. Su estado de ánimo es sumamente versátil, cambiante y curioso, lo que los lleva a buscar estímulos constantes, conversaciones interesantes y novedades intelectuales para mantener la calma interna. La rutina emocional les aburre y les genera una profunda ansiedad. Tienen una capacidad innata para racionalizar los sentimientos, lo que a veces puede hacerlos parecer distantes, superficiales o desconectados de la verdadera profundidad emocional, prefiriendo el ingenio verbal antes que la vulnerabilidad cruda. Son sumamente sociables, adaptables y con un sentido del humor agudo que utilizan como mecanismo de defensa ante situaciones incómodas. Su gran reto es la dispersión mental y la dificultad para quedarse quietos en el silencio de su mundo interno. Cuando aprenden a calmar la mente y a conectar el corazón con la palabra, se convierten en excelentes mediadores, capaces de expresar los sentimientos más complejos con una claridad, empatía, frescura y elocuencia verdaderamente extraordinarias.</text:p>
      <text:p text:style-name="P1"/>
      <text:p text:style-name="P1">Luna en Cáncer</text:p>
      <text:p text:style-name="P1">La Luna se encuentra en su propio domicilio en Cáncer, lo que potencia al máximo la sensibilidad, la intuición, la empatía y el instinto protector del individuo. Quienes poseen esta posición tienen un mundo emocional sumamente rico, profundo y cíclico, directamente conectado con las fases lunares y las atmósferas del entorno. Absorben la energía de los lugares y de las personas como esponjas psíquicas, lo que a menudo genera cambios de humor repentinos y la necesidad de replegarse en su caparazón para protegerse de la hostilidad externa. El hogar, la familia y el pasado son sus grandes refugios; buscan construir entornos íntimos, cálidos y seguros donde puedan nutrir a sus seres queridos y ser nutridos por ellos. Poseen una memoria emocional prodigiosa, recordando con precisión milimétrica cómo se sintieron en determinado momento de su infancia. Su gran desafío es evitar el chantaje emocional, la dependencia afectiva y la tendencia a victimizarse o a guardar rencores del pasado. Cuando sanan estas dependencias, despliegan una capacidad amorosa incondicional, convirtiéndose en fuentes inagotables de consuelo, sanación, protección y apoyo intuitivo para toda persona que tenga la fortuna de formar parte de su vida íntima.</text:p>
      <text:p text:style-name="P1"><text:soft-page-break/></text:p>
      <text:p text:style-name="P1">Luna en Leo</text:p>
      <text:p text:style-name="P1">La Luna en Leo vive y expresa su mundo emocional con una intensidad teatral, dramática, cálida y sumamente generosa. La seguridad afectiva de estos nativos depende del reconocimiento, el respeto y la admiración que reciben de su entorno; necesitan sentirse especiales, valorados y el centro de atención en sus círculos íntimos para alimentar su bienestar interno. Poseen un orgullo noble y un corazón enorme que se entrega con total lealtad y entusiasmo a las causas y personas que aman. Su orgullo es su punto más vulnerable; una crítica o un desaire a nivel afectivo los hiere profundamente, respondiendo a menudo con una actitud altiva o un drama exagerado para proteger su vulnerabilidad. Les encanta celebrar la vida, el romance, el arte y el juego, aportando una vibra festiva y optimista a cualquier hogar. El gran aprendizaje para esta Luna es no depender del aplauso externo ni de la validación constante de los demás para sentir amor propio. Cuando logran encontrar esa seguridad en su propio fuego interno, se transforman en protectores magnánicos, líderes afectivos inspiradores y fuentes de alegría desbordante capaces de iluminar con su calor los momentos más oscuros de las personas que los rodean.</text:p>
      <text:p text:style-name="P1"/>
      <text:p text:style-name="P1">Luna en Virgo</text:p>
      <text:p text:style-name="P1">La Luna en Virgo encuentra su estabilidad emocional a través del orden, la utilidad, el análisis práctico y el servicio hacia los demás. Estos nativos se sienten seguros cuando sus entornos están organizados, limpios y bajo un control lógico estricto; el caos exterior les genera una inmediata ansiedad interna. Procesan sus sentimientos de manera analítica, desmenuzando lo que sienten para encontrarle una explicación racional y una solución práctica. No son dados a las demostraciones dramáticas de afecto; prefieren demostrar su amor a través de actos concretos de servicio, como ayudar en las tareas diarias, cuidar la salud de sus seres queridos o resolver problemas logísticos cotidianos. Tienen una tendencia innata a la autocrítica severa y a la preocupación excesiva por el futuro, lo que puede somatizarse fácilmente en el sistema digestivo. Su gran desafío es aprender a relajar las exigencias y aceptar que las emociones humanas son inherentemente imperfectas y caóticas. Cuando logran dominar esta faceta, se convierten en los compañeros más confiables, eficientes, atentos y devotos del zodiaco, capaces de aportar una estructura sanadora, un sentido común impecable y un apoyo incondicional en el día a día.</text:p>
      <text:p text:style-name="P1"/>
      <text:p text:style-name="P1">Luna en Libra</text:p>
      <text:p text:style-name="P1">La Luna en Libra necesita la armonía, la paz, la belleza y las relaciones interpersonales equilibradas para sentirse emocionalmente segura y tranquila. Detesta los conflictos directos, los gritos y los ambientes toscos, buscando siempre actuar como mediadora para restaurar el equilibrio a su alrededor. El ámbito de la pareja es un espejo fundamental para su bienestar; estos nativos tienden a conocerse mejor y a procesar lo que sienten a través de la interacción constante con un otro. Tienen un encanto natural, una cortesía innata y un sentido estético refinado que aplican en su hogar y en su forma de vestir. Su principal debilidad es la indecisión y la tendencia a complacer en exceso a los demás con tal de evitar el rechazo o la confrontación, lo que a menudo los lleva a postergar sus propias necesidades emocionales. El gran reto evolutivo para esta posición es aprender a decir "no" y entender que la discordia a veces es necesaria para el crecimiento. Cuando encuentran su propio eje independiente, ofrecen un amor sumamente justo, empático, estético y civilizado, creando vínculos basados en el respeto mutuo, la diplomacia y una verdadera comunión intelectual.</text:p>
      <text:p text:style-name="P1"><text:soft-page-break/></text:p>
      <text:p text:style-name="P1">Luna en Escorpio</text:p>
      <text:p text:style-name="P1">La Luna en Escorpio dota a los individuos de una intensidad emocional subterránea, magnética, apasionada y sumamente transformadora. Aquí los sentimientos no se viven superficialmente; se experimentan de forma absoluta, rozando a menudo los extremos de la crisis, el renacimiento, los celos o el control. Poseen una intuición psíquica penetrante que les permite captar de inmediato las corrientes ocultas, los secretos y las motivaciones reales de los demás, lo que los vuelve inherentemente desconfiados. Guardan sus sentimientos bajo un estricto velo de reserva, protegiendo su extrema vulnerabilidad con una armadura de misterio. Exigen una lealtad absoluta y total entrega en sus vínculos afectivos; no toleran la superficialidad ni la traición. Su gran desafío es aprender a soltar los rencores, el deseo de venganza y la tendencia a autosabotearse mediante crisis emocionales cíclicas creadas por la mente. Cuando esta Luna atraviesa sus propios infiernos y se transforma, se convierte en una de las posiciones más poderosas del zodiaco, otorgando una resiliencia psicológica indestructible, una capacidad terapéutica única para sanar el dolor ajeno y un amor incondicional capaz de resistir las pruebas más duras de la vida.</text:p>
      <text:p text:style-name="P1"/>
      <text:p text:style-name="P1">Luna en Sagitario</text:p>
      <text:p text:style-name="P1">La Luna en Sagitario busca la seguridad emocional a través de la libertad, la expansión horizontal de la mente, los viajes y la búsqueda constante de un sentido filosófico para la existencia. Estos nativos necesitan espacio físico y mental para respirar; se sienten profundamente ahogados ante las restricciones emocionales, los celos o los entornos excesivamente rutinarios. Tienen un temperamento emocional inherentemente optimista, alegre, idealista y dotado de una fe ciega en el futuro que les permite recuperarse con rapidez de los golpes afectivos. Cuando se sienten abrumados, su mecanismo de defensa inmediato es la huida, ya sea física mediante un viaje o mental mediante el estudio de nuevas ideas. Son directos y honestos al expresar lo que sienten, a veces pecando de una total falta de tacto debido a su espontaneidad. Su gran reto es aprender a quedarse y sostener las situaciones emocionales incómodas o dolorosas de la realidad cotidiana, en lugar de maquillarlas con un positivismo superficial o escapar de ellas. Cuando maduran, se transforman en maestros del alma, ofreciendo una sabiduría emocional generosa, un entusiasmo contagioso y una guía inspiradora para quienes buscan un norte en la vida.</text:p>
      <text:p text:style-name="P1"/>
      <text:p text:style-name="P1">Luna en Capricornio</text:p>
      <text:p text:style-name="P1">La Luna en Capricornio se encuentra en detrimento, lo que otorga una naturaleza emocional sumamente reservada, contenida, responsable y enfocada en el autocontrol y el deber. Desde muy jóvenes, estos nativos sienten que deben ser fuertes y bastarse a sí mismos, por lo que tienden a reprimir, bloquear o postergar sus necesidades afectivas en favor de metas prácticas, profesionales o de estatus. Ven la vulnerabilidad como una debilidad peligrosa, prefiriendo mostrar al mundo una fachada de frialdad, seriedad o eficiencia indestructible. Su seguridad interna está directamente ligada al logro concreto, la estabilidad material y el respeto social. Demuestran su amor no con palabras románticas, sino asumiendo responsabilidades pesadas, protegiendo materialmente a los suyos y ofreciendo una lealtad a prueba de balas. El gran desafío de esta Luna es la rigidez, el aislamiento emocional y la propensión a la melancolía o la depresión debido a la autoexigencia implacable. Su aprendizaje consiste en ablandar el corazón y aprender a recibir cuidado sin sentirse culpables. Cuando maduran, ofrecen una madurez emocional inquebrantable, una sabiduría de vida profunda y un soporte estructural sumamente confiable para sus <text:soft-page-break/>seres queridos.</text:p>
      <text:p text:style-name="P1"/>
      <text:p text:style-name="P1">Luna en Acuario</text:p>
      <text:p text:style-name="P1">La Luna en Acuario experimenta y procesa su mundo emocional desde una distancia objetiva, lógica, desapegada y sumamente independiente. Para estos nativos, el torbellino de las pasiones humanas puede resultar incómodo o confuso, por lo que prefieren analizar sus sentimientos a través del intelecto y la razón social. Su seguridad interna depende por completo de la preservación de su libertad personal y de su individualidad; detestan las demandas emocionales sofocantes, los celos y las dinámicas familiares tradicionales asfixiantes. Se sienten como en casa dentro de grupos de amigos, colectivos, causas humanitarias o redes sociales donde se valore la fraternidad universal. Son sumamente tolerantes, abiertos e innovadores en su manera de concebir el hogar y los vínculos afectivos. Sin embargo, su principal reto es el desapego excesivo, que puede hacerlos parecer fríos, distantes o incapaces de conectar con la intimidad emocional cruda de una pareja. Cuando logran integrar su mente brillante con el corazón, se convierten en amigos incondicionales, compañeros sumamente respetuosos de la alteridad y promotores de una libertad afectiva revolucionaria basada en la confianza mutua, el respeto y la evolución colectiva.</text:p>
      <text:p text:style-name="P1"/>
      <text:p text:style-name="P1">Luna en Piscis</text:p>
      <text:p text:style-name="P1">La Luna en Piscis dota a los individuos de una sensibilidad mística, oceánica, infinita y profundamente empática. Aquí las fronteras del ego emocional se disuelven por completo; los nativos absorben las alegrías, los dolores, los miedos y las tensiones del entorno colectivo como si fueran propios, convirtiéndose en verdaderos barómetros psíquicos. Su mundo interno está plagado de sueños, fantasías, visiones artísticas y una profunda añoranza de conexión espiritual con el todo. Tienen una compasión universal ilimitada, sintiendo la necesidad de rescatar, cuidar o sacrificarse por cualquier ser vivo que sufra. Esta falta de filtros los vuelve sumamente vulnerables a la manipulación ajena y a la confusión interna. Su principal mecanismo de defensa ante la crudeza del mundo real es la evasión, el escapismo a través del aislamiento, el sueño o las fantasías idílicas. Su gran desafío evolutivo es aprender a poner límites psíquicos claros, diferenciando sus propios sentimientos de los ajenos. Cuando logran enraizarse, manifiestan un amor verdaderamente incondicional, una creatividad artística sublime y una capacidad terapéutica y espiritual capaz de llevar consuelo y sanación profunda a los rincones más desolados de la humanidad.</text:p>
      <text:p text:style-name="P1"/>
      <text:p text:style-name="P1">MERCURIO EN LOS 12 SIGNOS</text:p>
      <text:p text:style-name="P1">Mercurio en Aries</text:p>
      <text:p text:style-name="P1">Mercurio en Aries dota a la mente de una agilidad mental extraordinaria, un pensamiento directo, asertivo y sumamente competitivo. Quienes poseen esta posición no pierden el tiempo en rodeos conceptuales ni en deliberaciones eternas; captan las ideas al vuelo y toman decisiones de forma instantánea e independiente. Su comunicación es franca, decidida, enérgica y dotada de un entusiasmo contagioso que los convierte en excelentes oradores motivacionales o líderes de proyectos. Les encanta el debate intelectual y ven la discusión como un deporte estimulante donde ganar el argumento es la meta principal. Sin embargo, esta impulsividad mental es también su mayor debilidad. Tienden a sacar conclusiones precipitadas sin evaluar todos los datos, les cuesta escuchar con paciencia los puntos de vista ajenos y su <text:soft-page-break/>franqueza puede rozar la agresividad verbal o la falta de tacto. Se aburren con rapidez de los detalles técnicos o los procesos repetitivos de largo aliento. Su gran desafío consiste en desarrollar la escucha activa, la paciencia intelectual y la diplomacia. Cuando logran dominar su fuego mental, se transforman en pensadores brillantes, pioneros de ideas revolucionarias y estrategas capaces de abrir caminos intelectuales totalmente inéditos con absoluta valentía.</text:p>
      <text:p text:style-name="P1"/>
      <text:p text:style-name="P1">Mercurio en Tauro</text:p>
      <text:p text:style-name="P1">Mercurio en Tauro confiere un pensamiento lento, deliberado, sumamente práctico, realista y enfocado en la utilidad concreta de las ideas. Los nativos con esta posición no se dejan impresionar por teorías abstractas ni modas intelectuales pasajeras; necesitan tamizar la información a través del sentido común y ver cómo se aplica en el mundo material antes de aceptarla como válida. Una vez que asimilan un conocimiento, este se graba a fuego en su mente, mostrando una retención memoria excelente y una constancia admirable para ejecutar proyectos complejos paso a paso. Su estilo de comunicación es pausado, claro, conciso y directo, transmitiendo una gran sensación de seguridad y solidez. El principal inconveniente de esta posición es la marcada rigidez mental, la terquedad y la resistencia al cambio de opinión. Les cuesta horrores adaptarse a nuevas metodologías o reestructurar sus esquemas de pensamiento ante evidencias imprevistas. Su aprendizaje radica en flexibilizar la mente para no estancarse en dogmas prácticos. Cuando logran equilibrar esto, se convierten en excelentes administradores de recursos, estrategas financieros impecables y constructores intelectuales capaces de dar forma física, duradera y rentable a los conceptos más complejos.</text:p>
      <text:p text:style-name="P1"/>
      <text:p text:style-name="P1">Mercurio en Géminis</text:p>
      <text:p text:style-name="P1">Mercurio se encuentra en su propio domicilio en Géminis, lo que otorga una de las mentes más brillantes, ágiles, polifacéticas y curiosas de todo el zodiaco. Para estos nativos, el mundo es un flujo constante de información que debe ser recopilada, conectada, analizada y transmitida al instante. Poseen una velocidad de procesamiento mental asombrosa, una capacidad multitarea natural y una facilidad pasmosa para aprender idiomas, programar, escribir o dominar el arte de las ventas. Su comunicación es chispeante, ingeniosa, carismática y siempre provista de un fino sentido del humor. Tienen la virtud de ver todas las facetas de una misma cuestión simultáneamente, lo que los convierte en magníficos mediadores y reporteros de la realidad. El gran peligro de Mercurio aquí es la extrema dispersión, la superficialidad intelectual y la inconstancia. Les fascina comenzar mil estudios o proyectos a la vez, pero les cuesta horrores profundizar en uno solo o llevarlo a término una vez que la novedad inicial se desvanece. Su reto es enfocar su energía mental. Cuando lo logran, se transforman en comunicadores magistrales, escritores influyentes y pensadores capaces de revolucionar la educación y la transmisión del conocimiento humano.</text:p>
      <text:p text:style-name="P1"/>
      <text:p text:style-name="P1">Mercurio en Cáncer</text:p>
      <text:p text:style-name="P1">Mercurio en Cáncer configura una mente profundamente intuitiva, asociativa, imaginativa y teñida por los matices del mundo emocional y del pasado. Los nativos con esta posición no piensan de forma puramente lógica o matemática; procesan la información a través de lo que sienten frente a ella, lo que los dota de una memoria fotográfica y emocional verdaderamente prodigiosa. Son capaces de recordar con precisión los detalles de una conversación de la infancia debido al impacto sentimental que tuvo en ellos. Su estilo de <text:soft-page-break/>comunicación es suave, empático, protector y receptivo; prefieren escuchar atentamente el tono de voz y los silencios del interlocutor antes de emitir un juicio. Tienen un talento natural para la narrativa, la poesía, la psicología y la historia. Su principal debilidad es la falta de objetividad; tienden a tomarse las críticas de manera estrictamente personal y sus opiniones pueden verse distorsionadas por sus estados de ánimo cambiantes o sus prejuicios familiares. El gran reto para esta mente es aprender a separar los hechos lógicos de las emociones del momento. Cuando lo consiguen, despliegan una sabiduría empática excepcional, capaz de comunicar verdades profundas que consuelan, sanan y conectan al colectivo con sus raíces humanas.</text:p>
      <text:p text:style-name="P1"/>
      <text:p text:style-name="P1">Mercurio en Leo</text:p>
      <text:p text:style-name="P1">Mercurio en Leo otorga un pensamiento creativo, expresivo, dramático, orgulloso y dotado de una gran autoridad natural. Quienes poseen esta posición piensan a lo grande; no les interesan los detalles minúsculos, sino los conceptos amplios, los proyectos grandiosos y las ideas que dejen una huella duradera. Su estilo de comunicación es elocuente, persuasivo, magnético y digno de un líder; tienen un talento innato para la oratoria, el teatro, la enseñanza y la dirección de equipos, logrando capturar la atención de cualquier audiencia con solo abrir la boca. Tienen una confianza absoluta en sus propias ideas y una convicción que resulta contagiosa. Sin embargo, este orgullo mental puede derivar con facilidad en dogmatismo, egocentrismo intelectual y una marcada intolerancia hacia las opiniones que contradigan las suyas, interpretando los debates lógicos como ataques directos a su dignidad personal. Les cuesta aceptar que pueden estar equivocados. Su aprendizaje evolutivo consiste en desarrollar la humildad intelectual y aprender a escuchar con atención sincera los aportes de los demás. Cuando logran integrar esto, se transforman en pensadores magnánimos, mentores generosos y líderes capaces de inspirar a masas enteras hacia la consecución de ideales nobles y creativos.</text:p>
      <text:p text:style-name="P1"/>
      <text:p text:style-name="P1">Mercurio en Virgo</text:p>
      <text:p text:style-name="P1">Mercurio se encuentra en su domicilio y en exaltación en Virgo, configurando la mente analítica, detallista, lógica y organizada por excelencia del zodiaco. Para estos nativos, el pensamiento es una herramienta de precisión diseñada para clasificar los datos, detectar errores, optimizar procesos y buscar la perfección técnica. Poseen una capacidad de observación milimétrica y un enfoque sumamente práctico que les permite resolver problemas complejos de ingeniería, programación, contabilidad o investigación médica con absoluta facilidad. Su comunicación es clara, precisa, sobria y orientada a la resolución de problemas cotidianos, detestando la vaguedad o las exageraciones retóricas. El gran talón de Aquiles de Mercurio aquí es la tendencia a perderse en los detalles infinitos, perdiendo de vista la visión de conjunto del proyecto, así como una propensión obsesiva a la preocupación mental, la ansiedad y el perfeccionismo paralizante. Su mente crítica puede volverse mordaz tanto con los demás como con ellos mismos. Su reto es aprender a confiar en los procesos y relajar la mente. Cuando lo logran, se convierten en los analistas más brillantes, los editores más rigurosos y los técnicos más valiosos del entramado profesional y científico.</text:p>
      <text:p text:style-name="P1"/>
      <text:p text:style-name="P1">Mercurio en Libra</text:p>
      <text:p text:style-name="P1">Mercurio en Libra confiere un pensamiento diplomático, equilibrado, estético y profundamente enfocado en la justicia social y el entendimiento mutuo. Los nativos con esta posición analizan el mundo sopesando <text:soft-page-break/>constantemente los pros y los contras de cada situación; para ellos, toda moneda tiene dos caras válidas que merecen ser escuchadas con absoluto respeto. Su comunicación es sumamente educada, refinada, persuasiva y encantadora, buscando siempre evitar la confrontación directa y encontrar puntos de acuerdo comunes. Tienen un talento innato para la negociación, la diplomacia, las relaciones públicas y la crítica de arte, ya que poseen un sentido innato de la simetría y la armonía. El principal inconveniente de esta mente es la marcada indecisión crónica. Al ver el valor en todas las posturas, les cuesta horrores tomar una determinación firme y rápida por temor a ser injustos o a romper el equilibrio social del entorno, cayendo a veces en la complacencia verbal. Su aprendizaje radica en desarrollar la asertividad y la capacidad de tomar decisiones independientes. Cuando lo consiguen, se transforman en magníficos árbitros de la justicia, estrategas de la conciliación y pensadores capaces de pacificar los entornos más conflictivos.</text:p>
      <text:p text:style-name="P1"/>
      <text:p text:style-name="P1">Mercurio en Escorpio</text:p>
      <text:p text:style-name="P1">Mercurio en Escorpio dota a la mente de una agudeza detectivesca, una intuición penetrante, un pensamiento estratégico y una fiera determinación por descubrir la verdad oculta detrás de las apariencias. Estos nativos no se conforman con las explicaciones superficiales de la realidad; poseen una mente de rayos X capaz de descifrar los secretos, las motivaciones inconscientes y las debilidades del entorno humano con asombrosa precisión. Su estilo de comunicación es directo, reservado, magnético y a menudo sarcástico o mordaz; dicen mucho con pocas palabras y prefieren callar antes que emitir comentarios vacíos de contenido. Son excelentes investigadores, psicólogos, criminólogos, financieros y científicos debido a su capacidad para sostener la concentración obsesiva en problemas complejos durante largos periodos de tiempo. Sin embargo, esta intensidad mental puede derivar en desconfianza crónica, paranoia, fijaciones obsesivas y una tendencia a ver conspiraciones donde no las hay, utilizando la información como una herramienta de poder o control. Su reto es canalizar su mente hacia la sanación. Cuando lo logran, se convierten en pensadores sumamente poderosos, capaces de desentrañar los misterios más oscuros de la naturaleza humana con absoluta valentía y lucidez intelectual.</text:p>
      <text:p text:style-name="P1"/>
      <text:p text:style-name="P1">Mercurio en Sagitario</text:p>
      <text:p text:style-name="P1">Mercurio en Sagitario se encuentra en detrimento, lo que configura una mente expansiva, filosófica, idealista y orientada hacia las grandes visiones del mundo, pero a menudo desapegada de los detalles prácticos e inmediatos de la realidad cotidiana. Quienes poseen esta posición piensan en términos de leyes universales, religiones, culturas extranjeras y grandes corrientes de pensamiento. Su comunicación es sumamente entusiasta, directa, franca y optimista; adoran enseñar, debatir sobre moral o ética y contagiar a los demás con sus visiones de futuro. Sin embargo, su honestidad brutal a menudo carece de tacto, diciendo verdades incómodas sin medir las consecuencias sociales. Su principal debilidad es la falta de precisión, la exageración retórica y la tendencia a pasar por alto los datos técnicos o los pasos intermedios necesarios para ejecutar un proyecto real, cayendo en el dogmatismo ideológico o la charlatanería filosófica si no se controlan. Su gran reto es aprender a estructurar el pensamiento y validar los datos empíricos cotidianos. Cuando equilibran su fuego mental, se transforman en profesores inspiradores, conferencistas internacionales magníficos y visionarios capaces de abrir las mentes del colectivo hacia horizontes conceptuales y espirituales totalmente renovados.</text:p>
      <text:p text:style-name="P1"/>
      <text:p text:style-name="P1">Mercurio en Capricornio</text:p>
      <text:p text:style-name="P1"><text:soft-page-break/>Mercurio en Capricornio confiere una mente sumamente estructurada, disciplinada, realista, ambiciosa y dotada de un pragmatismo excepcional. Para estos nativos, el pensamiento es una herramienta de construcción a largo plazo; organizan sus ideas de forma jerárquica, metódica y lógica, enfocándose exclusivamente en objetivos que prometan resultados concretos, estabilidad material o prestigio profesional. Su estilo de comunicación es serio, sobrio, conciso y directo al grano; no pierden el tiempo en adornos retóricos, fantasías utópicas ni charlas triviales, prefiriendo que la solidez de sus argumentos y la evidencia empírica hablen por sí mismas. Son excelentes ejecutivos, ingenieros, políticos y administradores debido a su capacidad para concentrarse bajo presión, diseñar planes de contingencia rigurosos y mantener la cabeza fría ante las crisis del entorno. El peligro de esta posición es la excesiva rigidez mental, el pesimismo ante las novedades, el dogmatismo tradicionalista y una tendencia a cerrarse a conceptos creativos o innovadores que no encajen en sus estructuras preconcebidas. Su reto es abrir la mente al cambio. Cuando lo logran, se convierten en los estrategas estructurales más confiables, sólidos y respetados del entramado social y profesional.</text:p>
      <text:p text:style-name="P1"/>
      <text:p text:style-name="P1">Mercurio en Acuario</text:p>
      <text:p text:style-name="P1">Mercurio se encuentra en un signo de aire regido por Urano, lo que dota a la mente de una genialidad innovadora, una agilidad lógica sorprendente, un pensamiento vanguardista y una total independencia intelectual. Los nativos con esta posición piensan fuera de la caja; son los inventores, los científicos visionarios, los programadores disruptivos y los revolucionarios conceptuales del zodiaco. Poseen una capacidad única para ver el futuro, conectar datos aparentemente inconexos de forma científica y anticiparse a las necesidades tecnológicas y sociales del colectivo humano. Su comunicación es clara, objetiva, democrática y desapegada de las emociones personales, lo que les permite debatir sobre temas polémicos con una lucidez teórica impecable. Sin embargo, esta desconexión emocional puede hacerlos parecer fríos, arrogantes, tercos en sus propias utopías conceptuales o distantes de la realidad práctica de las personas comunes, cayendo en la excentricidad por el simple hecho de llevar la contraria a la norma establecida. Su reto es humanizar sus ideas. Cuando lo consiguen, se transforman en líderes del progreso humano, capaces de diseñar redes de conocimiento y herramientas tecnológicas que transformen la sociedad para siempre.</text:p>
      <text:p text:style-name="P1"/>
      <text:p text:style-name="P1">Mercurio en Piscis</text:p>
      <text:p text:style-name="P1">Mercurio en Piscis se encuentra en detrimento y caída, lo que configura una mente profundamente intuitiva, metafórica, imaginativa, artística y sumamente receptiva, pero alejada de los cánones de la lógica matemática o lineal tradicional. Estos nativos piensan en imágenes, símbolos, emociones y sensaciones sutiles; captan la información del entorno de forma holística y psíquica antes que a través de explicaciones conceptuales estructuradas. Su estilo de comunicación es poético, suave, empático, musical y dotado de una gran fantasía, destacando de manera brillante en la literatura de ficción, el cine, las artes visuales, la música y la psicología profunda. El gran inconveniente de esta mente es la marcada confusión mental, la desorganización de los datos prácticos, la distracción crónica y la tendencia a perderse en ensoñaciones utópicas o evasivas, costándoles horrores estructurar un discurso lógico o seguir instrucciones técnicas rígidas en el día a día. Su gran desafío evolutivo es aprender a enfocar la mente y poner orden en su caos creativo. Cuando lo logran, se transforman en canales de una sabiduría mística y creadores artísticos sublimes capaces de conmover profundamente el alma humana.<text:line-break/><text:line-break/><text:soft-page-break/><text:line-break/>VENUS EN LOS 12 SIGNOS</text:p>
      <text:p text:style-name="P1">Venus en Aries</text:p>
      <text:p text:style-name="P1">Venus en Aries vive el amor, el deseo y las relaciones de una manera apasionada, directa, impulsiva y sumamente competitiva. Al estar regido por el fuego de Marte, este posicionamiento busca la emoción de la conquista; le fascina el inicio de los romances, el cortejo dinámico y la adrenalina de perseguir lo que desea. No le interesa la sutileza ni los juegos de espera; expresa su afecto con una honestidad brutal, valentía y un entusiasmo que puede resultar arrollador. Su autoestima está ligada a su independencia y a su capacidad para valerse por sí misma, por lo que detesta las relaciones asfixiantes o rutinarias que limiten su libertad individual. Sin embargo, su mayor debilidad es la impaciencia y la tendencia al aburrimiento crónico una vez que la novedad inicial del romance se ha desvanecido, lo que puede llevar a rupturas repentinas o a crear conflictos artificiales solo para encender la chispa del drama pasional. Su gran aprendizaje consiste en desarrollar la constancia, la empatía y la ternura necesarias para sostener un compromiso a largo plazo. Cuando madura, ofrece un amor sumamente protector, leal, estimulante y lleno de un coraje inquebrantable capaz de defender a su pareja ante cualquier adversidad con absoluta entrega.</text:p>
      <text:p text:style-name="P1"/>
      <text:p text:style-name="P1">Venus en Tauro</text:p>
      <text:p text:style-name="P1">Venus se encuentra en su propio domicilio en Tauro, lo que otorga una naturaleza afectiva sumamente estable, sensual, paciente, fiel y profundamente vinculada a los placeres materiales y físicos de la existencia. Para este posicionamiento, el amor entra por los sentidos: necesita el contacto físico constante, las caricias, la comodidad de un hogar estético, la buena comida y la seguridad económica compartida. No tiene prisa en el cortejo; prefiere construir sus relaciones paso a paso sobre cimientos sólidos, realistas y duraderos. Posee un sentido de la estética muy desarrollado, apreciando el arte, la naturaleza y la calidad artesanal. Su principal talón de Aquiles es la terquedad, la resistencia al cambio y una marcada tendencia a la posesividad y los celos, viendo a la pareja o a los recursos como bienes de su propiedad por temor a la inestabilidad emocional. Le cuesta horrores salir de su zona de confort o terminar vínculos que ya son disfuncionales debido a su apego a la seguridad. Cuando equilibra este aspecto, se convierte en una de las posiciones más confiables y nutritivas del zodiaco, ofreciendo una lealtad inquebrantable, una paz romántica profunda y una capacidad única para disfrutar de la vida.</text:p>
      <text:p text:style-name="P1"/>
      <text:p text:style-name="P1">Venus en Géminis</text:p>
      <text:p text:style-name="P1">Venus en Géminis necesita la estimulación intelectual, la variedad, el juego verbal y la comunicación constante para sentirse atraída y enamorada. Para este signo de aire, el amor comienza en la mente; un diálogo chispeante, el ingenio, el humor y los intereses compartidos son mucho más seductores que el atractivo físico puro. Disfruta de la coquetería ligera, las citas dinámicas llenas de novedad, los viajes cortos y el intercambio constante de ideas. Su concepto de la relación ideal se basa en una profunda amistad y en el respeto mutuo a la libertad individual; detesta los celos, la intensidad dramática y la rutina asfixiante. El principal inconveniente de esta posición es la dispersión afectiva, la inconstancia y una tendencia a racionalizar en exceso las emociones, lo que puede hacer que parezca superficial, distante o incapaz de comprometerse a un nivel íntimo y vulnerable. Le aterra sentirse atrapada en un rol tradicional. Su aprendizaje evolutivo radica en aprender a profundizar en sus sentimientos y sostener los silencios del corazón. Cuando lo logra, se transforma en una compañera sumamente divertida, versátil, elocuente y <text:soft-page-break/>capaz de renovar constantemente la frescura y la alegría dentro de sus vínculos afectivos.</text:p>
      <text:p text:style-name="P1"/>
      <text:p text:style-name="P1">Venus en Cáncer</text:p>
      <text:p text:style-name="P1">Venus en Cáncer expresa su afecto a través del cuidado, la ternura, la protección y una profunda necesidad de intimidad y seguridad emocional. Para esta posición, el amor está íntimamente ligado al hogar, la familia, las raíces y la creación de un refugio seguro alejado de la hostilidad del mundo exterior. Son personas sumamente sensibles, intuitivas y empáticas que demuestran su amor cocinando para sus seres queridos, escuchando sus problemas y creando ambientes cálidos y acogedores. Tienen una memoria romántica prodigiosa y tienden a apegarse con fuerza al pasado y a los recuerdos nostálgicos. Sin embargo, su extrema vulnerabilidad los vuelve sumamente precavidos al principio de cualquier romance; se protegen bajo un caparazón y pueden usar el silencio o el chantaje emocional si se sienten heridos, rechazados o inseguros. Su gran desafío es evitar la dependencia afectiva, el miedo crónico al abandono y la tendencia a asfixiar a la pareja adoptando un rol excesivamente maternal o paternal que anule la pasión. Cuando sana estas inseguridades, despliega un amor incondicional, profundamente fiel, compasivo y dotado de una capacidad única para sanar los corazones rotos y sostener estructuras familiares sólidas y amorosas.</text:p>
      <text:p text:style-name="P1"/>
      <text:p text:style-name="P1">Venus en Leo</text:p>
      <text:p text:style-name="P1">Venus en Leo vive el amor y el romance con una intensidad dramática, orgullosa, apasionada, magnética y sumamente generosa. Para esta posición de fuego, el amor es un escenario donde necesita brillar, sentirse admirada, valorada y tratada como la realeza por su pareja. Expresa su afecto a través de grandes gestos románticos, regalos lujosos, declaraciones públicas y una lealtad inquebrantable hacia quienes forman parte de su corte afectiva. Posee un magnetismo personal arrollador y un fuerte sentido de la dignidad y el autorespeto. Su principal punto débil es su orgullo herido y una insaciable necesidad de validación externa, lo que puede derivar en egocentrismo, celos teatrales, vanidad o una actitud sumamente demandante si siente que no está recibiendo la atención que merece. Le aterra la indiferencia o pasar desapercibida dentro del vínculo. Su gran aprendizaje evolutivo consiste en comprender que el amor verdadero no requiere de un aplauso constante ni de un público, sino de una entrega genuina desde el corazón. Cuando lo consigue, se transforma en una de las posiciones más cálidas, protectoras, románticas y divertidas, capaz de llenar de luz, alegría, creatividad y optimismo la vida de su pareja.</text:p>
      <text:p text:style-name="P1"/>
      <text:p text:style-name="P1">Venus en Virgo</text:p>
      <text:p text:style-name="P1">Venus en Virgo encuentra su expresión afectiva a través del orden, la utilidad práctica, la devoción silenciosa y los actos concretos de servicio hacia los demás. No es una posición dada a las demostraciones románticas exageradas ni a los dramas pasionales; prefiere demostrar su amor de manera discreta y cotidiana, cuidando la salud de su pareja, organizando la logística del hogar o resolviendo problemas prácticos del día a día. Posee un sentido estético refinado basado en la limpieza, la sencillez y la funcionalidad de las cosas. Su principal debilidad es su espíritu analítico e hipercrítico aplicado a las relaciones; tiende a enfocarse en los pequeños defectos de su pareja o en las imperfecciones del vínculo, lo que genera una insatisfacción crónica, ansiedad y un perfeccionismo paralizante que sabotea el romance antes de que florezca. Le cuesta mucho dejarse llevar por la pasión debido a su necesidad de mantener el control lógico. Su desafío es aprender a relajar sus niveles de exigencia y aceptar que el amor es <text:soft-page-break/>inherentemente caótico. Cuando lo logra, se convierte en la compañera más leal, atenta, eficiente y dedicada, ofreciendo un soporte inestimable y una estabilidad afectiva indestructible en la realidad cotidiana.</text:p>
      <text:p text:style-name="P1"/>
      <text:p text:style-name="P1">Venus en Libra</text:p>
      <text:p text:style-name="P1">Venus se encuentra en su domicilio diurno en Libra, manifestando la máxima expresión de la diplomacia, el romance idealizado, la armonía estética y el deseo de justicia social en las relaciones. Para esta posición, la vida carece de color si no se comparte en pareja; busca la unión perfecta basada en la igualdad, el respeto mutuo, el refinamiento y el entendimiento intelectual constante. Detesta la ordinariez, la rudeza, los gritos y los conflictos directos, utilizando su encanto natural y su cortesía innata para pacificar cualquier entorno y complacer a los demás. Posee un gusto artístico exquisito, una elegancia natural y un amor profundo por el arte, el diseño y las convenciones sociales armoniosas. El gran peligro de esta posición es la indecisión crónica y la tendencia a postergar o camuflar sus verdaderos deseos y necesidades con tal de evitar la confrontación o el rechazo, cayendo en una superficialidad complaciente que carcome el vínculo desde adentro. Su aprendizaje radica en desarrollar la asertividad y comprender que la discordia a veces es necesaria para el crecimiento real. Cuando encuentra su propio eje independiente, ofrece un amor sumamente bello, equitativo, diplomático y verdaderamente civilizado.</text:p>
      <text:p text:style-name="P1"/>
      <text:p text:style-name="P1">Venus en Escorpio</text:p>
      <text:p text:style-name="P1">Venus en Escorpio vive el amor, el deseo y las relaciones desde una intensidad subterránea, magnética, apasionada y sumamente transformadora. Aquí no existen los romances superficiales ni las medias tintas; los vínculos se experimentan como una fusión total, tanto física como espiritual, que roza con frecuencia los extremos del misticismo, los celos, el control y el renacimiento psicológico. Posee un magnetismo sexual y emocional arrollador que fascina y asusta a la vez. Exige una lealtad absoluta y una entrega total de su pareja, guardando sus propios sentimientos bajo un velo de reserva estricto por temor a la traición o al rechazo de su extrema vulnerabilidad. Su gran desafío es superar la desconfianza crónica, la tendencia a la manipulación emocional y el autosabotaje a través de crisis afectivas cíclicas creadas por el miedo a perder el control sobre el otro. Cuando esta posición sana sus heridas y transmuta su energía, se convierte en una de las posiciones amorosas más poderosas y resilientes del zodiaco, otorgando una fidelidad indestructible, una capacidad terapéutica única para sostener al ser amado en sus momentos más oscuros y un amor incondicional capaz de resistir cualquier tormenta existencial.</text:p>
      <text:p text:style-name="P1"/>
      <text:p text:style-name="P1">Venus en Sagitario</text:p>
      <text:p text:style-name="P1">Venus en Sagitario concibe el amor y las relaciones como una gran aventura, un viaje de exploración mental y espiritual que debe estar libre de ataduras y restricciones asfixiantes. Para este posicionamiento de fuego, la pareja ideal es una compañera de viaje con quien pueda filosofar, explorar culturas extranjeras, acampar en la naturaleza y expandir constantemente sus horizontes intelectuales. Su estilo afectivo es sumamente optimista, generoso, alegre, directo y espontáneo, transmitiendo una fe contagiosa en el futuro del vínculo. Valora la honestidad por encima de todas las cosas, aunque a veces carece de tacto al expresar lo que siente. Detesta los celos, el control, los reclamos emocionales repetitivos y la rutina cotidiana gris. Su principal debilidad es la inconstancia, el miedo al compromiso tradicional y la tendencia a huir físicamente <text:soft-page-break/>o distanciarse emocionalmente cuando la relación exige madurez práctica o enfrenta momentos de dolor o aburrimiento. Su gran reto es aprender a enraizarse y sostener las responsabilidades del amor real cotidianas. Cuando madura, ofrece una sabiduría afectiva generosa, una lealtad basada en la libertad compartida y un entusiasmo inagotable capaz de mantener siempre viva la llama del amor.</text:p>
      <text:p text:style-name="P1"/>
      <text:p text:style-name="P1">Venus en Capricornio</text:p>
      <text:p text:style-name="P1">Venus en Capricornio enfoca el amor y las relaciones desde una perspectiva sumamente madura, responsable, reservada y orientada hacia el largo plazo y la estabilidad socioeconómica. No es una posición dada a los flechazos impulsivos ni a las demostraciones públicas de afecto; aborda el romance con cautela, evaluando el carácter, el estatus y la solidez de la otra persona antes de abrir su corazón. Para este signo de tierra, el amor se demuestra asumiendo responsabilidades pesadas, protegiendo materialmente a los suyos y ofreciendo una lealtad inquebrantable a prueba de balas. Su autoestima está ligada al logro y a su capacidad de autosuficiencia, por lo que valora enormemente el respeto mutuo y la ambición profesional en la pareja. Su peligro es la excesiva rigidez, la frialdad aparente y la tendencia a tratar la relación como un contrato comercial o un deber social, reprimiendo su sensibilidad por miedo a ser vulnerable. Su aprendizaje consiste en ablandar las defensas y permitirse disfrutar del placer sin culpa. Cuando madura, se convierte en una de las posiciones más confiables, sólidas y devotas del zodiaco, garantizando un refugio seguro, un apoyo estructural inestimable y un amor maduro que se fortalece con el paso del tiempo.</text:p>
      <text:p text:style-name="P1"/>
      <text:p text:style-name="P1">Venus en Acuario</text:p>
      <text:p text:style-name="P1">Venus en Acuario experimenta las relaciones desde un enfoque vanguardista, desapegado, sumamente independiente y basado primordialmente en la amistad y el respeto a la individualidad. Para este signo de aire, la pareja ideal debe ser antes que nada su mejor amiga; alguien con quien compartir ideales sociales, visiones de futuro y proyectos creativos alternativos sin caer en los roles tradicionales o posesivos de la pareja convencional. Expresa su afecto de forma democrática, tolerante, original y abierta, huyendo de los celos, los dramas emocionales sofocantes y las expectativas sociales rígidas. Valora su libertad por encima de todo y concede ese mismo espacio a la otra persona con total naturalidad. El gran inconveniente de esta posición es el desapego excesivo y una marcada frialdad o distanciamiento cuando el vínculo requiere intimidad emocional cruda, vulnerabilidad o un compromiso afectivo más tradicional, lo que puede hacer que parezca indiferente o inaccesible. Su reto consiste en aprender a conectar el intelecto con la profundidad del corazón. Cuando lo logra, ofrece un amor revolucionario, sumamente leal, basado en una confianza ciega, la camaradería y una evolución intelectual y humana compartida.</text:p>
      <text:p text:style-name="P1"/>
      <text:p text:style-name="P1">Venus en Piscis</text:p>
      <text:p text:style-name="P1">Venus se encuentra en exaltación en Piscis, manifestando la esencia más pura del amor incondicional, el romance místico, la compasión universal y la entrega absoluta al ser amado. Para esta posición de agua, el amor no tiene fronteras ni condiciones; busca una fusión espiritual idílica que trascienda la dura realidad material. Son personas sumamente sensibles, poéticas, románticas y dotadas de una imaginación artística sublime que proyecta en la pareja cualidades divinas. Tienen una capacidad única para el autosacrificio y el perdón, buscando rescatar o sanar a quienes sufren. Su gran debilidad es la total falta de límites emocionales, la propensión a la idealización excesiva de la pareja (lo que lleva a decepciones dolorosas) y la <text:soft-page-break/>tendencia a adoptar el rol de víctimas o salvadores dentro del vínculo afectivo. Les cuesta horrores ver la realidad tal como es, cayendo en el escapismo o sosteniendo relaciones disfuncionales por miedo a romper la fantasía del amor perfecto. Su gran desafío evolutivo es aprender a poner límites saludables y enraizar sus sentimientos en el mundo real. Cuando lo consigue, manifiesta un amor verdaderamente sublime, compasivo, sanador y lleno de una magia espiritual inigualable.</text:p>
      <text:p text:style-name="P1"/>
      <text:p text:style-name="P1">MARTE EN LOS 12 SIGNOS</text:p>
      <text:p text:style-name="P1">Marte en Aries</text:p>
      <text:p text:style-name="P1">Marte se encuentra en su propio domicilio en Aries, expresando su energía guerrera, su fuerza física y su instinto de acción en su estado más puro, directo, independiente y sumamente competitivo. Los nativos con esta posición poseen una vitalidad desbordante, una iniciativa arrolladora y un coraje inquebrantable que los impulsa a ser los primeros en todo lo que se proponen. No piensan dos veces antes de actuar; responden a los estímulos del entorno de forma instantánea y decisiva, enfrentando los obstáculos con valentía y determinación. Les encanta el desafío físico, el deporte y los proyectos que requieran un liderazgo firme y rápido. Su principal talón de Aquiles es su temperamento explosivo, la impaciencia crónica y una impulsividad peligrosa que los lleva a actuar sin medir las consecuencias prácticas, cayendo en la agresividad verbal o física si se sienten frustrados o limitados por el entorno. Les cuesta horrores sostener la constancia en el tiempo una vez que la excitación del inicio decae. Su reto es canalizar su enorme fuerza vital hacia fines constructivos mediante la disciplina. Cuando lo logran, se convierten en líderes extraordinarios capaces de abrir caminos inéditos y motivar a otros a superar sus límites.</text:p>
      <text:p text:style-name="P1"/>
      <text:p text:style-name="P1">Marte en Tauro</text:p>
      <text:p text:style-name="P1">Marte en Tauro se encuentra en detrimento, lo que reconfigura la energía dinámica y asertiva de este planeta en una fuerza sumamente lenta, constante, paciente, pragmática y enfocada en la resistencia material. Quienes poseen esta posición no actúan por impulsos repentinos; planifican sus acciones con meticulosidad, midiendo el esfuerzo y buscando siempre un beneficio práctico, económico o de estabilidad a largo plazo. Tienen una fuerza física y una perseverancia admirables; son capaces de sostener trabajos pesados o proyectos complejos durante años sin rendirse jamás. Su ira tarda muchísimo en acumularse, pero cuando finalmente estalla tras aguantar en silencio durante largo tiempo, puede ser tan destructiva e implacable como una erupción volcánica, mostrando una terquedad absoluta incapaz de ceder o perdonar con rapidez. Su gran debilidad es la inercia, la pereza inicial para arrancar nuevos proyectos y una marcada rigidez que los hace resistirse al cambio de métodos de trabajo. Su gran desafío es aprender a flexibilizar sus acciones y soltar el control de los recursos. Cuando lo logran, se transforman en constructores excepcionales, estrategas financieros infalibles y ejecutores de una eficiencia material verdaderamente indestructible.</text:p>
      <text:p text:style-name="P1"/>
      <text:p text:style-name="P1">Marte en Géminis</text:p>
      <text:p text:style-name="P1">Marte en Géminis canaliza su energía competitiva, su agresividad y su impulso de acción a través de la mente, la palabra, el debate intelectual y la comunicación versátil. Para estos nativos, el campo de batalla predilecto es la palabra; poseen un ingenio verbal afilado como una espada, una agilidad mental pasmosa y <text:soft-page-break/>una capacidad para la réplica sarcástica que puede desarmar a cualquier oponente en segundos. Les fascina la multitarea, emprender múltiples proyectos simultáneamente, viajar de un lado a otro y mantenerse en constante movimiento físico e intelectual para evitar el aburrimiento crónico. Su motivación depende directamente de la variedad y del estímulo intelectual constante. Su principal inconveniente es la tremenda dispersión de su fuerza vital, la inconstancia y la tendencia a dejar los proyectos a medio terminar una vez que pierden el interés mental inicial. Su energía puede volverse sumamente nerviosa, traduciéndose en una verborragia ansiosa, discusiones inútiles o una actitud sumamente combativa a nivel intelectual que genera tensiones en su entorno social. Su gran reto es enfocar su energía mental. Cuando lo consiguen, se convierten en polemistas brillantes, comunicadores persuasivos, escritores prolíficos y estrategas capaces de coordinar logísticas complejas con absoluta frescura y eficacia.</text:p>
      <text:p text:style-name="P1"/>
      <text:p text:style-name="P1">Marte en Cáncer</text:p>
      <text:p text:style-name="P1">Marte en Cáncer se encuentra en caída, lo que debilita la expresión directa, asertiva y combativa de la energía marciana, tiñéndola de los matices defensivos, emocionales e intuitivos del signo de agua. Los nativos con esta posición no atacan de frente; prefieren actuar de forma indirecta, sutil y estratégica, protegiendo siempre su seguridad emocional y la de su familia. Su motivación y su nivel de energía física están íntimamente ligados a sus estados de ánimo cambiantes; si se sienten seguros y amados, su capacidad de trabajo es inmensa, pero si experimentan rechazo o tensión, su energía cae en picada. Su agresividad se manifiesta de manera pasivo-agresiva, acumulando resentimientos bajo su caparazón protector hasta que estallan en reproches emocionales o manipulación sentimental. Tienen un instinto defensivo feroz para proteger su hogar, sus raíces y a los suyos ante cualquier amenaza externa. Su gran desafío evolutivo consiste en desarrollar una asertividad directa, aprendiendo a expresar su rabia de forma clara y saludable sin guardarla en el cuerpo. Cuando maduran esta faceta, despliegan un coraje protector extraordinario, convirtiéndose en guardianes incansables y defensores sumamente leales y compasivos de las causas comunitarias y familiares.</text:p>
      <text:p text:style-name="P1"/>
      <text:p text:style-name="P1">Marte en Leo</text:p>
      <text:p text:style-name="P1">Marte en Leo otorga un impulso de acción creativo, expresivo, dramático, orgulloso y dotado de una enorme autoridad y magnetismo natural. Quienes poseen esta posición actúan con un gran sentido de la dignidad, la nobleza y el estilo; necesitan que sus acciones dejen una huella grandiosa, sean reconocidas, aplaudidas y sirvan de inspiración para los demás. Poseen una vitalidad física envidiable, una autoconfianza inquebrantable y un espíritu de liderazgo nato que los impulsa a asumir la dirección de cualquier proyecto artístico, empresarial o político con absoluto entusiasmo. Son guerreros leales que defienden sus ideales y a sus seres queridos con un coraje magnánimo. Sin embargo, su mayor debilidad es su orgullo hipertrofiado, el egocentrismo y una intolerancia absoluta hacia la crítica o la derrota, interpretando cualquier oposición lógica a sus acciones como una ofensa directa a su majestad personal. Pueden volverse autoritarios, dominantes y caer en rabietas teatrales desproporcionadas si no se salen con la suya. Su aprendizaje consiste en desarrollar la humildad en la acción. Cuando lo logran, se transforman en líderes profundamente generosos, creadores brillantes y motores de inspiración capaces de guiar a equipos enteros hacia metas sumamente nobles y elevadas.</text:p>
      <text:p text:style-name="P1"/>
      <text:p text:style-name="P1">Marte en Virgo</text:p>
      <text:p text:style-name="P1"><text:soft-page-break/>Marte en Virgo canaliza su impulso de acción y su energía de trabajo a través de la precisión analítica, la atención meticulosa al detalle, la organización práctica y el espíritu de servicio útil. Para estos nativos, la eficiencia es la mayor de las virtudes; abordan sus tareas diarias con una disciplina militar, una meticulosidad técnica impecable y un enfoque sumamente realista orientado a la optimización de procesos y la resolución de problemas cotidianos. Son los artesanos y técnicos más dedicados, destacando en la investigación, la contabilidad, la programación o cualquier labor que requiera una concentración minuciosa y un control de calidad riguroso. Su ira se manifiesta como una irritabilidad nerviosa ante el desorden, la ineficiencia o la incompetencia del entorno. Su principal debilidad es la tendencia a perderse en los detalles infinitos del proceso, lo que puede provocar un perfeccionismo paralizante que retrase la entrega del proyecto, así como una propensión crónica al estrés laboral y la autocrítica destructiva. Su gran desafío consiste en aprender a delegar y aceptar la impermanencia de los resultados prácticos. Cuando logran equilibrar esta faceta, se convierten en ejecutores indispensables de una confiabilidad, precisión y utilidad verdaderamente incomparables.</text:p>
      <text:p text:style-name="P1"/>
      <text:p text:style-name="P1">Marte en Libra</text:p>
      <text:p text:style-name="P1">Marte en Libra se encuentra en detrimento, lo que significa que la energía puramente individualista, egoísta y agresiva de Marte debe aprender a expresarse a través de los canales de la diplomacia, la cooperación mutua, la justicia social y el consenso de la balanza. Los nativos con esta posición detestan los conflictos directos, la rudeza y las decisiones unilaterales, prefiriendo actuar de común acuerdo con su entorno o su pareja. Son excelentes estrategas de la conciliación, relacionistas públicos magníficos y defensores incansables de la justicia y los derechos humanos, utilizando la palabra educada y la ley en lugar de la fuerza bruta. Sin embargo, este deseo crónico de mantener la armonía a toda costa genera una marcada indecisión paralizante a la hora de actuar; sopesan tanto los pros y los contras de cada acción por temor a ser injustos o a desagradar a alguien, que a menudo pierden la oportunidad idónea o postergan sus propias metas individuales. Su rabia suele reprimirse y manifestarse de forma pasivo-agresiva. Su aprendizaje radica en desarrollar la asertividad independiente. Cuando lo consiguen, se transforman en árbitros de la paz excepcionales, capaces de liderar causas sociales con una elegancia, equidad y convicción admirables.</text:p>
      <text:p text:style-name="P1"/>
      <text:p text:style-name="P1">Marte en Escorpio</text:p>
      <text:p text:style-name="P1">Marte se encuentra en su domicilio tradicional en Escorpio, otorgando una fuerza de voluntad indestructible, un impulso de acción sumamente estratégico, una resistencia física asombrosa y una energía emocional subterránea e intensamente concentrada. Los nativos con esta posición no desperdician su energía en batallas superficiales o ruidosas; actúan con la precisión silenciosa de un cirujano o un detective, esperando el momento exacto para dar el golpe decisivo con absoluta eficacia. Poseen un magnetismo personal y una determinación obsesiva que les permite sostener la concentración en metas extremadamente complejas durante años, creciendo ante las crisis o los peligros que harían rendirse a cualquiera. Su ira es profunda, fría, controlada y sumamente reservada, lo que los vuelve oponentes temibles que rara vez perdonan una traición. Su gran peligro es la tendencia a la desconfianza crónica, la manipulación estratégica, los celos posesivos o el deseo de venganza implacable, utilizando su inmenso poder para controlar el entorno de forma invisible. Su gran reto evolutivo es canalizar esta inmensa fuerza marciana hacia la transmutación psicológica y la sanación ajena. Cuando lo logran, se convierten en líderes resilientes e indestructibles capaces de guiar al colectivo a través de las transformaciones más profundas.</text:p>
      <text:p text:style-name="P1"><text:soft-page-break/></text:p>
      <text:p text:style-name="P1">Marte en Sagitario</text:p>
      <text:p text:style-name="P1">Marte en Sagitario impulsa la acción a través del idealismo, el optimismo inquebrantable, las grandes visiones filosóficas y una insaciable necesidad de aventura física e intelectual. Quienes poseen esta posición actúan guiados por sus convicciones éticas y morales; necesitan que sus esfuerzos cotidianos tengan un sentido trascendente y sirvan para expandir horizontes. Tienen una vitalidad física desbordante que disfrutan canalizar a través de los deportes al aire libre, los viajes de exploración, la docencia o la defensa apasionada de causas ideológicas. Su estilo de combate es noble, directo, franco y sumamente entusiasta, contagiando su fe en el futuro a todo su entorno profesional o personal. Sin embargo, su principal debilidad es la falta de constancia frente a los detalles cotidianos y aburridos de la realidad, la exageración de sus propias capacidades físicas o logísticas (lo que los lleva a abarcar más de lo que pueden apretar) y una marcada tendencia al dogmatismo arrogante, creyendo que sus acciones y opiniones son las únicas válidas. Su gran desafío consiste en aprender a estructurar su energía y respetar las opiniones ajenas. Cuando maduran, se transforman en maestros inspiradores y visionarios capaces de liderar grandes cruzadas culturales.</text:p>
      <text:p text:style-name="P1"/>
      <text:p text:style-name="P1">Marte en Capricornio</text:p>
      <text:p text:style-name="P1">Marte se encuentra en exaltación en Capricornio, manifestando una de las posiciones más eficientes, disciplinadas, realistas y exitosas de todo el zodiaco. Aquí la energía dinámica de Marte se somete al control riguroso, la paciencia y la planificación a largo plazo de Saturno. Los nativos con esta posición ven la vida como una carrera de resistencia; no buscan la gratificación instantánea, sino el éxito duradero, el estatus social y la construcción de estructuras sólidas paso a paso. Poseen una capacidad de trabajo implacable, una cabeza fría ante las crisis más severas y una resistencia al estrés laboral verdaderamente admirable. Su ira está completamente controlada y canalizada hacia la ambición productiva, prefiriendo responder con resultados concretos antes que con explosiones temperamentales inútiles. Su principal peligro es convertirse en adictos al trabajo implacables, adoptando una actitud autoritaria, fría, calculadora o maquiavélica donde el fin justifique los medios, descuidando por completo su mundo emocional y su salud física por la obsesión con el control social y el éxito práctico. Su aprendizaje es humanizar su ambición. Cuando lo logran, se convierten en los líderes estructurales, ejecutivos y constructores más respetados, sólidos e indispensables del entramado social.</text:p>
      <text:p text:style-name="P1"/>
      <text:p text:style-name="P1">Marte en Acuario</text:p>
      <text:p text:style-name="P1">Marte en Acuario impulsa la acción de una manera sumamente innovadora, original, lógica, independiente y profundamente orientada hacia el progreso social y las causas colectivas. Para estos nativos, el motor de la acción no es la ambición personal ni el beneficio material individual, sino la transformación revolucionaria de las estructuras sociales obsoletas en favor de la humanidad. Actúan fuera de la caja, utilizando metodologías tecnológicas vanguardistas, el trabajo en red y la cooperación democrática de equipos multidisciplinarios. Defienden su libertad personal de acción a toda costa y apoyan con firmeza el derecho de los demás a ser originales y autónomos. Sin embargo, su principal debilidad es la marcada terquedad ideológica y un desapego emocional frío que puede hacer que sus acciones parezcan impersonales, distantes o insensibles ante las necesidades afectivas individuales de su entorno cercano, cayendo con frecuencia en la excentricidad rebelde por el simple gusto de desafiar a la autoridad <text:soft-page-break/>establecida. Su gran reto es integrar la mente brillante con la empatía humana cotidiana. Cuando lo consiguen, se transforman en los líderes del progreso científico y social, capaces de coordinar revoluciones conceptuales que transformen el futuro colectivo de manera permanente.</text:p>
      <text:p text:style-name="P1"/>
      <text:p text:style-name="P1">Marte en Piscis</text:p>
      <text:p text:style-name="P1">Marte en Piscis canaliza su impulso de acción, su energía física y su asertividad a través de los canales de la intuición sutil, la sensibilidad espiritual, la creatividad artística y la compasión universal ilimitada. Los nativos con esta posición no imponen su voluntad por la fuerza ni actúan mediante la lógica lineal; prefieren fluir con las corrientes del entorno como el agua, actuando de forma indirecta, pacífica, poética y sumamente sutil. Su motivación y su fuerza física son cíclicas y dependen por completo de su sintonía espiritual y de su estado de ánimo; se sienten profundamente inspirados para actuar cuando se trata de causas humanitarias, artísticas o de sanación ajena, siendo capaces de sacrificarse de forma abnegada por los desfavorecidos. Su agresividad se disuelve o se manifiesta de manera esquiva, costándoles horrores enfrentar los conflictos directos o competir en entornos corporativos hostiles. Su gran peligro es la inacción crónica, la distracción, la confusión de metas prácticas y la tendencia al escapismo o a adoptar el rol de víctimas indefensas ante las presiones de la realidad material. Su desafío es enraizarse. Cuando lo logran, se convierten en canales de inspiración artística, terapeutas excepcionales y guerreros de la paz con un poder sanador infinito.<text:line-break/><text:line-break/>Júpiter en Aries</text:p>
      <text:p text:style-name="P1">Júpiter en Aries expande la conciencia, la sabiduría y la buena fortuna a través del desarrollo de la iniciativa individual, el coraje inquebrantable, el liderazgo independiente y un espíritu pionero sumamente competitivo. Quienes poseen esta posición de fuego encuentran sus mayores oportunidades de crecimiento y éxito cuando confían plenamente en sus propios instintos y se atreven a abrir caminos inéditos, asumiendo riesgos que harían temblar a otros. Su filosofía de vida se basa en la acción heroica y el autoaprendizaje continuo; creen firmemente que el destino favorece a los valientes. Tienen una fe ciega en sus capacidades y un entusiasmo contagioso que los convierte en excelentes motivadores, capaces de inspirar a equipos enteros hacia la consecución de metas audaces. Sin embargo, su principal debilidad es la tendencia a la arrogancia intelectual, la impaciencia crónica ante los procesos ajenos y una impulsividad temeraria que los lleva a abarcar más de lo que pueden manejar, subestimando los peligros prácticos por un exceso de optimismo egocéntrico. Su gran reto es desarrollar la paciencia estratégica y la humildad. Cuando maduran, se transforman en líderes visionarios sumamente generosos, capaces de iniciar revoluciones conceptuales y guiar al colectivo hacia la autosuficiencia con absoluta valentía y lucidez espiritual.</text:p>
      <text:p text:style-name="P1"/>
      <text:p text:style-name="P1">Júpiter en Tauro</text:p>
      <text:p text:style-name="P1">Júpiter en Tauro expande la abundancia, la buena fortuna y la sabiduría espiritual a través de la conexión con el mundo material, el sentido común práctico, la paciencia y el uso responsable de los recursos tangibles. Los nativos con esta posición encuentran su crecimiento y su sentido de la felicidad cuando construyen sobre bases sólidas, estables y realistas, demostrando un talento innato para la gestión financiera, la agricultura, el arte y la preservación de la naturaleza. Su filosofía de vida valora la simplicidad, la comodidad del hogar, la lealtad inquebrantable y los placeres sensoriales que ofrece la existencia <text:soft-page-break/>cotidiana. Creen que la verdadera riqueza se cultiva paso a paso, con constancia y respeto por los ciclos orgánicos. El principal peligro de este emplazamiento es caer en el materialismo excesivo, la complacencia, la pereza y una terquedad absoluta ante cualquier cambio de perspectiva ideológica, confundiendo el valor espiritual con la acumulación de bienes materiales o la comodidad. Su reto consiste en aprender a soltar el control y confiar en la impermanencia de las formas. Cuando equilibran esta faceta, se convierten en verdaderos imanes de prosperidad, capaces de generar abundancia duradera y compartir una sabiduría profundamente enraizada, nutritiva y reconfortante.</text:p>
      <text:p text:style-name="P1"/>
      <text:p text:style-name="P1">Júpiter en Géminis</text:p>
      <text:p text:style-name="P1">Júpiter en Géminis se encuentra en detrimento, lo que reconfigura la energía expansiva y filosófica de este planeta en una búsqueda inagotable de información, variedad intelectual, curiosidad versátil y comunicación constante. Para estos nativos, la buena fortuna y la comprensión del universo se alcanzan acumulando datos, conectando ideas, aprendiendo idiomas, escribiendo y participando en debates chispeantes. Su filosofía de vida es sumamente abierta, tolerante y adaptable; creen que la verdad no es un dogma único, sino un mosaico de múltiples perspectivas válidas que merecen ser exploradas. Destacan de manera brillante en la enseñanza, el periodismo, las ventas y el comercio, aportando un entusiasmo juvenil e ingenioso a cualquier entorno intelectual. El gran talón de Aquiles de esta posición es la extrema dispersión mental, la superficialidad conceptual y la inconstancia. Tienden a saber un poco de todo pero a no profundizar en nada, perdiéndose en los detalles infinitos de la información cotidiana y perdiendo la visión de conjunto o el sentido de propósito trascendente de la vida. Su gran reto es enfocar su mente. Cuando lo logran, se transforman en comunicadores magistrales, educadores influyentes y divulgadores capaces de democratizar el conocimiento humano con absoluta frescura y elocuencia.</text:p>
      <text:p text:style-name="P1"/>
      <text:p text:style-name="P1">Júpiter en Cáncer</text:p>
      <text:p text:style-name="P1">Júpiter se encuentra en exaltación en Cáncer, manifestando una de las posiciones más generosas, compasivas, protectoras y espiritualmente nutritivas de todo el zodiaco. Aquí, la buena fortuna, la sabiduría y la abundancia se expanden a través del desarrollo de la empatía, la protección del hogar, el cuidado de la familia y el fortalecimiento de las raíces emocionales y comunitarias. Los nativos con este emplazamiento poseen una intuición psicológica prodigiosa y un corazón inmenso que busca cobijar a los desfavorecidos; su filosofía de vida se basa en el amor incondicional, la hospitalidad y la preservación de las tradiciones humanas nobles. Encuentran sus mayores bendiciones cuando crean entornos cálidos, seguros y acogedores donde los demás puedan sanar. El peligro de este emplazamiento radica en el exceso de apego al pasado, la dependencia afectiva asfixiante, el patriotismo exacerbado o una tendencia al sentimentalismo manipulador por el miedo crónico al abandono o al cambio social. Su reto evolutivo es establecer límites saludables y expandir su instinto maternal o paternal hacia todo el colectivo humano. Cuando lo consiguen, se transforman en fuentes inagotables de consuelo, sabiduría emocional y estabilidad espiritual para toda persona que cruce su camino.</text:p>
      <text:p text:style-name="P1"/>
      <text:p text:style-name="P1">Júpiter en Leo</text:p>
      <text:p text:style-name="P1">Júpiter en Leo expande la conciencia, el crecimiento personal y la buena fortuna a través de la creatividad desbordante, la expresión dramática, el orgullo noble y una autoconfianza magnética y generosa. Quienes <text:soft-page-break/>poseen esta posición de fuego encuentran sus mayores oportunidades de éxito cuando actúan con magnanimidad, lideran con el corazón y se atreven a brillar con luz propia en escenarios públicos, artísticos o empresariales. Su filosofía de vida celebra la alegría, el romance, el juego y el autorespeto; creen firmemente que la vida es una obra de arte divina que debe ser vivida con entusiasmo, dignidad y pasión. Son líderes natos que poseen un talento único para inspirar, motivar y elevar la autoestima de quienes los rodean gracias a su optimismo contagioso. Sin embargo, su mayor peligro es caer en la megalomanía, el egocentrismo intelectual, la vanidad extravagante y una insaciable necesidad de aplauso y validación externa que los vuelva tiránicos o dogmáticos ante las críticas ajenas. Su gran aprendizaje consiste en desarrollar la humildad sincera. Cuando lo logran, se convierten en mentores profundamente generosos, creadores brillantes y faros de luz capaces de guiar al colectivo hacia ideales verdaderamente nobles.</text:p>
      <text:p text:style-name="P1"/>
      <text:p text:style-name="P1">Júpiter en Virgo</text:p>
      <text:p text:style-name="P1">Júpiter en Virgo se encuentra en detrimento, lo que significa que la energía expansiva, optimista y abstracta de este planeta debe someterse al análisis meticuloso, el orden práctico, el realismo crítico y el espíritu de servicio cotidiano. Los nativos con esta posición encuentran su sabiduría, su buena fortuna y su crecimiento personal cuando se dedican a optimizar procesos, cuidar la salud del cuerpo, resolver problemas logísticos complejos y ser genuinamente útiles a la sociedad. Su filosofía de vida valora la humildad, la precisión técnica, el trabajo bien hecho y el respeto por los detalles cotidianos; creen que la divinidad se manifiesta en el orden perfecto de las pequeñas cosas. Destacan en la investigación médica, la contabilidad, la programación o la ecología. El gran peligro de esta posición es perderse en el perfeccionismo paralizante, la preocupación obsesiva por el futuro, la ansiedad crónica y una actitud hipercrítica destructiva que nuble su fe en la vida y sabotee su visión de conjunto, cayendo en un escepticismo materialista rígido. Su reto es aprender a confiar en el flujo del universo. Cuando lo logran, se transforman en los analistas más brillantes y servidores indispensables, capaces de manifestar una estructura sanadora.</text:p>
      <text:p text:style-name="P1"/>
      <text:p text:style-name="P1">Júpiter en Libra</text:p>
      <text:p text:style-name="P1">Júpiter en Libra expande la conciencia, la sabiduría y la buena fortuna a través del desarrollo de las relaciones interpersonales armónicas, la diplomacia, el refinamiento estético y la búsqueda incansable de la justicia social y el equilibrio. Quienes poseen esta posición encuentran sus mayores bendiciones cuando trabajan en cooperación mutua, actúan como mediadores en conflictos complejos y promueven la equidad y los derechos humanos en todas sus facetas. Su filosofía de vida se basa en el respeto a la alteridad, la paz, la cortesía innata y la belleza; creen firmemente que la evolución humana se logra a través del entendimiento mutuo y el diálogo civilizado. Poseen un gusto artístico exquisito que disfrutan compartir. Sin embargo, su principal debilidad es la tendencia a la indecisión crónica por el miedo exagerado a romper la armonía social, la dependencia de la aprobación externa y una superficialidad complaciente que los lleve a evitar posturas firmes o a tolerar injusticias con tal de mantener una paz artificial. Su aprendizaje consiste en desarrollar la asertividad ética. Cuando lo consiguen, se transforman en magníficos jueces, árbitros de la paz y estrategas de la conciliación verdaderamente excepcionales.</text:p>
      <text:p text:style-name="P1"/>
      <text:p text:style-name="P1">Júpiter en Escorpio</text:p>
      <text:p text:style-name="P1">Júpiter en Escorpio expande la conciencia, la sabiduría y el crecimiento a través de la investigación <text:soft-page-break/>profunda de los misterios de la vida, la intensidad emocional subterránea, el pensamiento estratégico y la transmutación psicológica. Quienes poseen esta posición encuentran su buena fortuna y su poder espiritual cuando se atreven a mirar en los rincones más oscuros de la naturaleza humana, creciendo de manera asombrosa ante las crisis, los tabúes, las finanzas compartidas y los procesos de regeneración personal. Su filosofía de vida es apasionada, mística e indestructible; poseen una fe inquebrantable en su capacidad para renacer de sus propias cenizas tras cualquier golpe del destino. Tienen un talento innato para la psicología profunda, el esoterismo, la investigación científica y la gestión de recursos estratégicos. El gran peligro de este emplazamiento es caer en la obsesión por el control secreto, la desconfianza crónica, el fanatismo dogmático o la manipulación del poder emocional y material en beneficio propio. Su reto consiste en perdonar y soltar los rencores. Cuando lo logran, se convierten en sanadores espirituales sumamente poderosos, terapeutas excepcionales y guías psicológicos capaces de sostener al colectivo en las transformaciones más profundas.</text:p>
      <text:p text:style-name="P1"/>
      <text:p text:style-name="P1">Júpiter en Sagitario</text:p>
      <text:p text:style-name="P1">Júpiter se encuentra en su propio domicilio en Sagitario, manifestando la máxima expresión del optimismo inquebrantable, la fe ciega en el futuro, el amor por la libertad y la expansión mental y física sin límites. Los nativos con esta posición son los eternos viajeros y filósofos del zodiaco; encuentran su buena fortuna, su crecimiento espiritual y su felicidad explorando culturas extranjeras, estudiando religiones comparadas, practicando deportes al aire libre y buscando constantemente el significado trascendente de la existencia. Su filosofía de vida es alegre, generosa, expansiva y sumamente entusiasta, poseyendo un talento innato para la docencia, las leyes, el turismo internacional y la oratoria inspiracional. El gran peligro de Júpiter aquí es el exceso de confianza, la exageración retórica irresponsable, la falta de realismo práctico y una marcada tendencia al dogmatismo arrogante o fanatismo ideológico, creyendo que su verdad es la única válida y pecando de una honestidad brutal que carece por completo de tacto social. Su gran reto es aprender a enraizarse en la realidad cotidiana. Cuando maduran, se transforman en maestros del alma sabios, generosos y faros de inspiración espiritual incomparables.</text:p>
      <text:p text:style-name="P1"/>
      <text:p text:style-name="P1">Júpiter en Capricornio</text:p>
      <text:p text:style-name="P1">Júpiter en Capricornio se encuentra en caída, lo que reconfigura la energía expansiva, idealista y optimista de este planeta en una estructura sumamente realista, disciplinada, prudente y enfocada en la ambición material, el deber y el éxito a largo plazo. Los nativos con este emplazamiento encuentran su sabiduría, su buena fortuna y su crecimiento personal cuando asumen responsabilidades pesadas, planifican con meticulosidad jerárquica y construyen instituciones sólidas que prometan estabilidad socioeconómica y prestigio profesional. Su filosofía de vida valora la tradición, el esfuerzo ético, el autocontrol y el respeto por la ley; creen que el crecimiento verdadero se gana con sudor, perseverancia y resistencia ante las dificultades. Destacan como ejecutivos, políticos, ingenieros y administradores excepcionales. El peligro de esta posición es caer en un pesimismo rígido, un materialismo calculador maquiavélico, la tacañería o una obsesión con el estatus social que los vuelva fríos y autoritarios, ahogando su fe en la magia de la vida. Su reto es flexibilizar su estructura. Cuando lo logran, se convierten en los líderes estructurales más confiables, sólidos, éticos y respetados del entramado social y profesional.</text:p>
      <text:p text:style-name="P1"/>
      <text:p text:style-name="P1">Júpiter en Acuario</text:p>
      <text:p text:style-name="P1"><text:soft-page-break/>Júpiter en Acuario expande la conciencia, la sabiduría y la buena fortuna a través de la innovación conceptual, el pensamiento vanguardista, la total independencia intelectual y la entrega humanitaria a las causas colectivas y el progreso social. Para estos nativos, el crecimiento se alcanza cuando desafían los dogmas tradicionales, trabajan en redes cooperativas multidisciplinarias y promueven la fraternidad universal y la libertad de pensamiento. Su filosofía de vida es democrática, tolerante, científica y profundamente orientada hacia el futuro; creen firmemente que la evolución humana depende de la tecnología ética y de la reforma social. Poseen un talento único para coordinar grandes grupos de personas sin perder el respeto por la originalidad de cada individuo. El peligro de este emplazamiento es caer en la utopía abstracta inaplicable, una terquedad ideológica fanática o un desapego emocional frío que los vuelva insensibles o arrogantes ante las necesidades afectivas individuales de su entorno cercano. Su gran reto es humanizar sus ideales prácticos. Cuando lo consiguen, se transforman en líderes revolucionarios del progreso científico, capaces de diseñar redes de conocimiento verdaderamente transformadoras.</text:p>
      <text:p text:style-name="P1"/>
      <text:p text:style-name="P1">Júpiter en Piscis</text:p>
      <text:p text:style-name="P1">Júpiter se encuentra en su domicilio tradicional en Piscis, manifestando una de las posiciones más místicas, espirituales, compasivas y artísticamente sublimes del zodiaco. Aquí, la buena fortuna, la sabiduría y el crecimiento se expanden a través de la disolución del ego, el amor incondicional universal, la intuición psíquica y la conexión espiritual con el todo. Los nativos con esta posición poseen una fe innata en la bondad del universo y una empatía infinita que los impulsa a sacrificarse de forma abnegada por el alivio del sufrimiento ajeno; su filosofía de vida celebra la mística, el arte, la música y la sanación holística. Encuentran sus mayores bendiciones cuando fluyen con la vida y actúan como canales de compasión. El peligro de este emplazamiento es caer en la inacción crónica, la confusión de metas prácticas, el escapismo evasivo a través de fantasías o adicciones, y la tendencia a adoptar el rol de víctimas indefensas ante las presiones de la realidad material. Su reto es aprender a poner límites saludables. Cuando lo logran, despliegan una sabiduría espiritual infinita, convirtiéndose en faros de paz, misticismo y sanación profunda.</text:p>
      <text:p text:style-name="P1"/>
      <text:p text:style-name="P1">SATURNO EN LOS 12 SIGNOS</text:p>
      <text:p text:style-name="P1">Saturno en Aries</text:p>
      <text:p text:style-name="P1">Saturno en Aries reconfigura la energía impulsiva, valiente e independiente del signo de fuego en una estructura que exige autodisciplina, control del temperamento, paciencia estratégica y una redefinición del liderazgo personal. Quienes poseen esta posición experimentan desde muy jóvenes miedos o bloqueos internos relacionados con su capacidad para afirmarse, tomar la iniciativa o competir en el mundo, sintiendo a menudo que su voluntad es reprimida por la autoridad externa. Su gran prueba existencial consiste en construir una confianza en sí mismos sólida y realista que no dependa de la agresividad defensiva ni de la impulsividad imprudente. Tienen el desafío de aprender a sostener los proyectos a largo plazo con constancia, superando la tendencia al aburrimiento o la frustración inmediata cuando las cosas no salen a su manera al primer intento. Su peligro es volverse sumamente rígidos, autoritarios o desarrollar un miedo paralizante a la acción independiente. Cuando logran dominar esta faceta mediante la madurez y la autodisciplina, se transforman en líderes excepcionalmente responsables, estrategas infalibles y pioneros capaces de abrir caminos duraderos con un coraje templado a fuego, absoluto autorespeto y una eficiencia inquebrantable.</text:p>
      <text:p text:style-name="P1"/>
      <text:p text:style-name="P1"><text:soft-page-break/>Saturno en Tauro</text:p>
      <text:p text:style-name="P1">Saturno en Tauro enfoca sus lecciones de madurez, disciplina y estructura en el plano material, la seguridad económica, el manejo de los recursos tangibles y el valor personal. Desde temprana edad, estos nativos pueden experimentar una profunda ansiedad o miedos irracionales relacionados con la carencia, la pobreza o la inestabilidad física, lo que los impulsa a trabajar con una tenacidad, prudencia y paciencia extraordinarias para construir un patrimonio sólido y duradero. Su ética laboral es impecable; son constructores realistas que avanzan paso a paso, respetando las leyes del esfuerzo continuo. Sin embargo, el gran talón de Aquiles de esta posición es la extrema rigidez mental, la terquedad obsesiva, la tacañería y una resistencia feroz ante cualquier tipo de cambio o innovación, aferrándose a situaciones disfuncionales o bienes materiales por el simple miedo crónico a salir de su zona de confort físico. Su gran reto evolutivo consiste en comprender que la verdadera seguridad es interna y radica en la adaptabilidad. Cuando maduran esta energía saturnina, se convierten en administradores de recursos impecables, pilares de estabilidad familiar y arquitectos de estructuras económicas sumamente rentables, sólidas y duraderas.</text:p>
      <text:p text:style-name="P1"/>
      <text:p text:style-name="P1">Saturno en Géminis</text:p>
      <text:p text:style-name="P1">Saturno en Géminis estructura, disciplina y pone a prueba los procesos mentales, la comunicación, la capacidad de aprendizaje y las relaciones sociales inmediatas. En su juventud, estos nativos suelen experimentar timidez verbal, dificultades en los estudios elementales o un miedo crónico a ser juzgados como tontos o superficiales, lo que los lleva a desarrollar una mente sumamente rigurosa, analítica, escéptica y orientada a los datos empíricos verificables. Su comunicación se vuelve seria, concisa, precisa y responsable, detestando las charlas triviales o las exageraciones retóricas. Son excelentes investigadores, escritores técnicos, científicos y administradores logísticos debido a su capacidad para concentrarse en detalles complejos bajo presión intelectual. El peligro de esta posición es caer en el cinismo intelectual, el aislamiento social, el pesimismo mental y una rigidez conceptual que les dificulte comprender los matices emocionales o abstractos de la vida, sufriendo de ansiedad por el control de la información. Su reto radica en flexibilizar la mente y aprender a confiar en la intuición verbal. Cuando maduran, se transforman en comunicadores de una elocuencia magistral, profesores sumamente rigurosos y pensadores capaces de dar estructura lógica a conceptos revolucionarios.</text:p>
      <text:p text:style-name="P1"/>
      <text:p text:style-name="P1">Saturno en Cáncer</text:p>
      <text:p text:style-name="P1">Saturno en Cáncer se encuentra en detrimento, lo que genera una profunda necesidad de estructurar, proteger y poner límites estrictos al mundo emocional, el hogar y las relaciones familiares. Desde la infancia, estos nativos suelen sentir una falta de nutrición afectiva o responsabilidades familiares pesadas y prematuras, lo que los lleva a construir una armadura rígida de frialdad o distanciamiento aparente para proteger su extrema vulnerabilidad interna. Su seguridad interna depende de su capacidad para bastarse a sí mismos emocionalmente, asumiendo el rol de protectores serios de su entorno privado. El peligro de esta posición es caer en el aislamiento afectivo, la melancolía crónica, el resentimiento hacia el pasado y una tendencia a reprimir los sentimientos por el miedo paralizante al rechazo o al abandono, volviéndose defensivos y rígidos dentro del hogar. Su gran aprendizaje evolutivo consiste en ablandar el corazón, aprender a expresar la vulnerabilidad con madurez y sanar los vínculos con las raíces familiares. Cuando lo logran, se convierten en los pilares más confiables, estables y devotos de su familia, capaces de ofrecer un soporte estructural inestimable y un amor maduro, fiel y sumamente protector.</text:p>
      <text:p text:style-name="P1"><text:soft-page-break/></text:p>
      <text:p text:style-name="P1">Saturno en Leo</text:p>
      <text:p text:style-name="P1">Saturno en Leo impone lecciones de madurez, disciplina y responsabilidad en las áreas de la creatividad, el orgullo, el liderazgo y la expresión personal del ego. Quienes poseen esta posición experimentan a menudo miedos internos relacionados con el rechazo, el ridículo público o la falta de reconocimiento, lo que en su juventud puede manifestarse como timidez artística o una autocrítica severa que bloquea su espontaneidad. Para protegerse, tienden a desarrollar un autocontrol estricto y una fachada de seriedad, dignidad y autorespeto inquebrantables. Su ética de liderazgo es sumamente responsable; no buscan el aplauso fácil, sino el éxito basado en el esfuerzo real y el talento técnico cultivado con paciencia. Sin embargo, su mayor peligro es volverse autoritarios, dominantes, sumamente rígidos en su orgullo o caer en una envidia silenciosa hacia quienes brillan sin esfuerzo, reprimiendo su propia alegría y capacidad de juego por un exceso de solemnidad egocéntrica. Su reto es aprender a brillar desde la humildad del corazón. Cuando maduran esta energía, se transforman en directores excepcionales, mentores de una integridad intachable y líderes creativos capaces de inspirar con absoluta autoridad moral.</text:p>
      <text:p text:style-name="P1"/>
      <text:p text:style-name="P1">Saturno en Virgo</text:p>
      <text:p text:style-name="P1">Saturno en Virgo encuentra una gran afinidad natural, configurando una mente sumamente disciplinada, trabajadora, analítica y obsesionada con el orden, la eficiencia técnica, la salud física y el servicio práctico responsable. Para estos nativos, el deber cotidiano y la optimización de los procesos son una prioridad absoluta; abordan sus tareas laborales con una meticulosidad milimétrica, una puntualidad militar y un enfoque realista orientado a la resolución de problemas lógicos. Son los analistas de calidad, contadores, científicos e ingenieros más confiables del zodiaco. El gran talón de Aquiles de esta posición es la propensión crónica al estrés laboral, la hipocondría, la ansiedad por el control minucioso y un perfeccionismo paralizante que les genera insatisfacción constante tanto con ellos mismos como con su entorno, volviéndose hipercríticos destructivos. Su gran desafío consiste en comprender que la perfección absoluta no existe en el mundo material y que es necesario delegar y relajar las exigencias diarias. Cuando logran equilibrar esta faceta saturnina, se convierten en ejecutores de una confiabilidad, precisión y utilidad verdaderamente incomparables, garantizando el éxito sostenible de cualquier estructura profesional en la realidad cotidiana.</text:p>
      <text:p text:style-name="P1"/>
      <text:p text:style-name="P1">Saturno en Libra</text:p>
      <text:p text:style-name="P1">Saturno se encuentra en exaltación en Libra, manifestando una de las posiciones más justas, éticas, diplomáticas, maduras y responsables del zodiaco en lo que respecta a las relaciones interpersonales, los contratos legales y los compromisos sociales. Desde jóvenes, estos nativos entienden que los vínculos afectivos o profesionales exigen un esfuerzo real, honestidad, igualdad mutua y respeto a las reglas del juego, por lo que abordan el matrimonio o las sociedades con una seriedad y cautela extremas. Son excelentes jueces, abogados, mediadores y relacionistas públicos debido a su capacidad para evaluar los conflictos con absoluta imparcialidad y cabeza fría. El peligro de este emplazamiento es el miedo crónico a la soledad o al rechazo que los lleve a sostener relaciones disfuncionales o rígidas por el simple sentido del deber contractual, o por el contrario, a aislarse emocionalmente por temor a perder su independencia. Su aprendizaje consiste en equilibrar la distancia lógica con la entrega afectiva sincera. Cuando maduran, ofrecen un amor sumamente equitativo, diplomático, fiel y verdaderamente civilizado, construyendo <text:soft-page-break/>uniones estables capaces de resistir cualquier tormenta existencial a largo plazo.</text:p>
      <text:p text:style-name="P1"/>
      <text:p text:style-name="P1">Saturno en Escorpio</text:p>
      <text:p text:style-name="P1">Saturno en Escorpio impone pruebas existenciales profundas, lecciones de madurez y una disciplina rigurosa en las áreas de la intimidad emocional, la sexualidad, las finanzas compartidas, los tabúes y los procesos de transformación psicológica. Estos nativos poseen miedos intensos relacionados con la traición, la pérdida del control secreto y la vulnerabilidad cruda, lo que los impulsa a construir defensas psicológicas impenetrables y a guardar sus sentimientos bajo un velo de reserva absoluto. Tienen una fuerza de voluntad y una resiliencia indestructible; son capaces de sostener concentraciones obsesivas y superar crisis financieras o emocionales severas que harían rendirse a cualquiera. Sin embargo, su principal peligro es la desconfianza crónica, la paranoia, el deseo de venganza frío y calculado, y una tendencia a la manipulación estratégica o al control invisible del entorno por el pánico a ser dominados por el otro. Su gran reto evolutivo consiste en aprender a perdonar, abrir el corazón y confiar en el flujo de la vida compartida. Cuando logran transmutar esta energía saturnina, se convierten en psicólogos profundos, financieros impecables, sanadores resilientes y guías capaces de sostener al colectivo en las transformaciones más duras.</text:p>
      <text:p text:style-name="P1"/>
      <text:p text:style-name="P1">Saturno en Sagitario</text:p>
      <text:p text:style-name="P1">Saturno en Sagitario disciplina, estructura y pone a prueba las creencias filosóficas, la religión, la moral, las leyes, la educación superior y los viajes largos. En su juventud, estos nativos pueden experimentar crisis de fe, miedos intelectuales o una rigidez dogmática estricta, buscando con obsesión la verdad absoluta a través de estructuras académicas o morales rígidas para calmar su incertidumbre interna. Su ética es sumamente seria; se toman los principios de justicia y moralidad con absoluta responsabilidad, convirtiéndose en defensores rigurosos de la ley, profesores exigentes o investigadores eruditos. Su peligro radica en caer en el fanatismo ideológico, la intolerancia dogmática, el escepticismo amargado o un pesimismo intelectual que les impida disfrutar de la aventura y la libertad espontánea de la vida, juzgando con dureza a quienes no comparten sus códigos éticos particulares. Su gran reto evolutivo consiste en comprender que la sabiduría real es flexible y tolerante con la alteridad. Cuando maduran esta energía, se transforman en maestros espirituales de una integridad intachable, juristas excepcionales y visionarios capaces de dar una estructura práctica, ética y duradera a las grandes corrientes culturales del colectivo humano.</text:p>
      <text:p text:style-name="P1"/>
      <text:p text:style-name="P1">Saturno en Capricornio</text:p>
      <text:p text:style-name="P1">Saturno se encuentra en su propio domicilio en Capricornio, manifestando la máxima expresión de la disciplina, el realismo pragmático, la paciencia estratégica, la ambición profesional y la responsabilidad estructural. Los nativos con esta posición ven la vida como una rigurosa carrera de resistencia; están diseñados para la escalada lenta pero segura hacia la cima del éxito social, el estatus y la estabilidad material, asumiendo cargas pesadas con una seriedad y un estoicismo admirables desde muy jóvenes. Su capacidad de organización, su cabeza fría ante las peores crisis económicas y su respeto por la jerarquía y las tradiciones los convierten en los ejecutivos, políticos, ingenieros y administradores más eficientes del entramado social. El gran peligro de este emplazamiento es convertirse en adictos al trabajo implacables, <text:soft-page-break/>adoptando una actitud fría, calculadora y maquiavélica donde el fin justifique los medios, reprimiendo por completo su mundo emocional y su salud física por la obsesión enfermiza con el control y el éxito práctico. Su aprendizaje es humanizar su ambición. Cuando lo logran, se transforman en los líderes estructurales y constructores más respetados, sólidos, éticos e indispensables de la sociedad.</text:p>
      <text:p text:style-name="P1"/>
      <text:p text:style-name="P1">Saturno en Acuario</text:p>
      <text:p text:style-name="P1">Saturno se encuentra en su domicilio tradicional en Acuario, estructurando, disciplinando y organizando las dinámicas de los grupos sociales, las amistades, los ideales humanitarios y el progreso científico y tecnológico. Estos nativos poseen una mente científica, sumamente lógica, objetiva y desapegada que busca dar una estructura práctica y duradera a las reformas sociales utópicas. Tienen una ética de fraternidad universal muy responsable; se toman muy en serio su papel dentro del colectivo, trabajando con paciencia en redes cooperativas o activismo social para mejorar el futuro humano. El peligro de esta posición radica en el aislamiento social por el miedo crónico a perder su individualidad, una terquedad ideológica fanática y un desapego emocional frío que los vuelva distantes, dogmáticos en sus propios conceptos de vanguardia o insensibles ante las necesidades afectivas individuales de su entorno íntimo. Su gran reto evolutivo consiste en integrar su brillante mente colectiva con la empatía del corazón cotidiano. Cuando maduran esta energía, se convierten en los arquitectos del progreso social, científicos de una integridad intachable y amigos incondicionales capaces de sostener redes humanas sumamente estables y evolucionadas.</text:p>
      <text:p text:style-name="P1"/>
      <text:p text:style-name="P1">Saturno en Piscis</text:p>
      <text:p text:style-name="P1">Saturno en Piscis introduce las lecciones de estructura, disciplina, límites y realismo en el océano de la sensibilidad mística, la intuición sutil, el inconsciente colectivo y la creatividad artística. Quienes poseen esta posición experimentan miedos vagos, culpas irracionales o una profunda ansiedad existencial relacionada con la pérdida de control o el caos emocional, lo que en su juventud puede llevarlos a construir barreras rígidas contra su propia sensibilidad psíquica. Su gran desafío consiste en dar una forma concreta, práctica y disciplinada a su inmensa imaginación y talentos artísticos o espirituales, evitando caer en la inacción o el escapismo evasivo. Son excelentes psicólogos, terapeutas, músicos, artistas o trabajadores humanitarios debido a su capacidad para estructurar la compasión y el dolor ajeno con madurez y cabeza fría. Su peligro es el escepticismo espiritual amargado, el aislamiento defensivo o la tendencia a adoptar el rol de víctimas sufridas ante las presiones de la realidad material. Su aprendizaje radica en enraizar el misticismo. Cuando maduran, se convierten en canales de una sabiduría espiritual sublime, terapeutas de una confiabilidad absoluta y guerreros de la paz sumamente realistas.<text:line-break/><text:line-break/>Urano en Aries</text:p>
      <text:p text:style-name="P1">Urano en Aries revoluciona la conciencia colectiva a través de ráfagas de individualismo radical, un espíritu pionero indomable y una necesidad imperiosa de libertad absoluta. En esta posición de fuego, la energía uraniana se manifiesta como un rayo de innovación disruptiva: los nativos y las generaciones bajo este influjo son los inventores independientes, los activistas rebeldes y los emprendedores tecnológicos que desafían las normas establecidas sin dudarlo. Su lema es romper con el pasado de forma instantánea y radical, abriendo caminos totalmente inéditos en la ciencia, la política o la ingeniería mediante una audacia que roza la temeridad. Sin embargo, su principal debilidad radica en una impulsividad caótica, la <text:soft-page-break/>intolerancia absoluta hacia la autoridad tradicional y una tendencia a iniciar revoluciones destructivas sin un plan de contingencia realista, cayendo en el fanatismo del cambio por el simple gusto de rebelarse. Su gran desafío evolutivo consiste en aprender a canalizar este fuego innovador mediante la paciencia estratégica y la cooperación social. Cuando maduran, se transforman en líderes visionarios capaces de guiar a la sociedad hacia la autosuficiencia tecnológica y conceptual con un coraje verdaderamente histórico, inspirando a la humanidad a conquistar fronteras espaciales, intelectuales o de libertad individual que antes parecían totalmente inalcanzables.</text:p>
      <text:p text:style-name="P1"/>
      <text:p text:style-name="P1">Urano en Tauro</text:p>
      <text:p text:style-name="P1">Urano en Tauro introduce revoluciones tecnológicas y cambios disruptivos drásticos en las estructuras más rígidas y tradicionales del planeta: la economía global, el sistema financiero, el uso de la tierra, la agricultura y el concepto mismo de valor material. Bajo este tránsito generacional, las bases de la estabilidad tangible se transforman por completo, dando origen a innovaciones como las criptomonedas, la digitalización de los recursos, la biotecnología ecológica y nuevas formas sustentables de construcción y producción alimentaria. A nivel individual, los nativos desarrollan una mente que busca la independencia económica a través de métodos de vanguardia, rompiendo con los esquemas laborales tradicionales de sus padres. El gran peligro de este emplazamiento es la inercia inicial que se resiste al cambio hasta que este estalla de forma destructiva, o por el contrario, una obsesión caótica por controlar los recursos tecnológicos que genere crisis económicas severas por codicia o inestabilidad práctica. Su reto evolutivo consiste en flexibilizar el apego material y comprender que la verdadera seguridad radica en la adaptabilidad a los ciclos de la naturaleza y del progreso técnico. Cuando equilibran esta faceta, se convierten en los constructores e ingenieros de una economía sostenible y duradera, integrando la vanguardia con el sentido común terrestre.</text:p>
      <text:p text:style-name="P1"/>
      <text:p text:style-name="P1">Urano en Géminis</text:p>
      <text:p text:style-name="P1">Urano en Géminis dota a la mente colectiva de una genialidad innovadora desbordante, una velocidad de procesamiento lógico sorprendente y una revolución total en los sistemas de comunicación, educación y transporte. Esta generación es la arquitecta de las autopistas de la información, el internet de alta velocidad, las redes sociales disruptivas y las metodologías educativas alternativas basadas en la inteligencia artificial y el aprendizaje autodidacta. Para el individuo, esta posición otorga una curiosidad mental insaciable, un ingenio verbal afilado y una facilidad pasmosa para conectar datos aparentemente inconexos, destacando de manera brillante en la programación, el periodismo de vanguardia y las ciencias de la computación. El gran talón de Aquiles de Urano aquí es la extrema dispersión nerviosa, la inconstancia intelectual crónica y una propensión a la ansiedad mental o al agotamiento psíquico debido a la sobreestimulación de información cotidiana. Sus ideas pueden volverse tan excéntricas o desapegadas de la realidad práctica que caigan en la charlatanería teórica o generen discusiones caóticas inútiles que fracturen el entorno social. Su reto es enfocar su mente brillante. Cuando lo logran, se transforman en divulgadores magistrales y estrategas de la comunicación, capaces de democratizar el conocimiento humano con absoluta frescura.</text:p>
      <text:p text:style-name="P1"/>
      <text:p text:style-name="P1">Urano en Cáncer</text:p>
      <text:p text:style-name="P1"><text:soft-page-break/>Urano en Cáncer revoluciona de manera radical los conceptos tradicionales del hogar, la familia, las raíces emocionales, la vivienda y la seguridad comunitaria. Bajo este influjo generacional, las estructuras familiares convencionales se transforman para dar paso a modelos vanguardistas y alternativos: comunidades intencionales, hogares domóticos autosustentables, familias ensambladas y una redefinición total de los roles domésticos. A nivel individual, los nativos experimentan una profunda necesidad de independencia emocional, rompiendo con los condicionamientos patriarcales o matriarcales de su pasado genético para construir su propia noción de pertenencia libre de ataduras asfixiantes. Poseen una intuición psicológica y psíquica muy aguda teñida de genialidad creativa. Sin embargo, su principal peligro es la inestabilidad emocional crónica, la tendencia a huir repentinamente de los compromisos afectivos por el pánico a perder la libertad individual, y una rebeldía caprichosa que los lleve a sabotear su propia paz interna por un exceso de desapego defensivo. Su gran desafío evolutivo consiste en aprender a poner límites saludables sin aislarse del calor humano cotidiano. Cuando maduran esta energía, despliegan una capacidad única para crear entornos familiares innovadores, estables y sumamente fraternos, convirtiéndose en protectores de una libertad afectiva revolucionaria y verdaderamente inclusiva.</text:p>
      <text:p text:style-name="P1"/>
      <text:p text:style-name="P1">Urano en Leo</text:p>
      <text:p text:style-name="P1">Urano en Leo enciende una revolución creativa, artística, expresiva y un individualismo orgulloso sumamente magnético y disruptivo en el corazón del colectivo humano. Esta generación rompe de forma radical con los cánones estéticos establecidos, transformando el arte, el teatro, el cine y la música a través del uso de tecnologías de vanguardia y una expresión dramática totalmente libre de censuras tradicionales. Los individuos bajo esta influencia poseen una confianza ciega en su originalidad, un fuerte sentido de la soberanía personal y un talento natural para el liderazgo innovador que busca inspirar al entorno a romper con los dogmas de la autoridad obsoleta. Sin embargo, su mayor peligro radica en la megalomanía intelectual, un egocentrismo rebelde hipertrofiado y una intolerancia absoluta hacia la disciplina o el trabajo en equipo convencional, interpretando cualquier sugerencia de moderación práctica como un ataque directo a su genialidad creativa. Pueden volverse tiranos excéntricos que busquen llamar la atención a toda costa a través del drama tecnológico o la provocación vacía de contenido. Su aprendizaje consiste en desarrollar la humildad sincera. Cuando lo consiguen, se transforman en mentores excepcionales y faros de inspiración capaces de liderar revoluciones culturales sumamente nobles, generosas y vanguardistas.</text:p>
      <text:p text:style-name="P1"/>
      <text:p text:style-name="P1">Urano en Virgo</text:p>
      <text:p text:style-name="P1">Urano en Virgo canaliza su energía revolucionaria e innovadora a través de la precisión analítica, la medicina científica de vanguardia, la automatización industrial, la ecología tecnológica y la optimización del trabajo cotidiano. Esta generación transforma el mercado laboral mediante la introducción de la robótica, la inteligencia artificial en la contabilidad y la ingeniería de datos, así como una revolución en la salud a través de terapias holísticas basadas en la ciencia sutil y la preservación ambiental rigurosa. A nivel individual, otorga una mente técnica brillante, obsesionada con la eficiencia lógica y la resolución de problemas metodológicos complejos con absoluta facilidad. El gran peligro de Urano en esta posición es la propensión crónica a la ansiedad nerviosa, la hipocondría tecnológica y un perfeccionismo caótico que sabotee los procesos prácticos por la obsesión enfermiza con el control del más mínimo detalle, cayendo en una crítica destructiva mordaz hacia los sistemas tradicionales. Su gran desafío consiste en aprender a delegar y aceptar la imperfección inherente de la materia. Cuando logran equilibrar esta faceta uraniana, se convierten en los ingenieros, analistas de sistemas y científicos más valiosos del entramado profesional, <text:soft-page-break/>garantizando soluciones de una utilidad, precisión y confiabilidad verdaderamente incomparables.</text:p>
      <text:p text:style-name="P1"/>
      <text:p text:style-name="P1">Urano en Libra</text:p>
      <text:p text:style-name="P1">Urano en Libra revoluciona por completo las dinámicas de las relaciones interpersonales, los contratos legales, el matrimonio, la diplomacia y el concepto mismo de justicia social y equilibrio estético. Bajo este tránsito generacional, los vínculos de pareja tradicionales se transforman de forma radical para dar paso a uniones basadas en la libertad absoluta, la independencia mutua, los acuerdos abiertos y la igualdad de derechos sin importar las convenciones del pasado. A nivel individual, los nativos poseen un encanto social vanguardista y una mente sumamente diplomática que busca resolver conflictos complejos mediante la mediación tecnológica y legal innovadora, rompiendo con los prejuicios sociales rígidos. El principal inconveniente de esta posición es la inestabilidad crónica en las relaciones, el pánico al compromiso convencional que lleve a rupturas repentinas e inexplicables, y una indecisión caótica provocada por el miedo a perder la autonomía personal dentro del vínculo afectivo. Su gran aprendizaje radica en desarrollar la asertividad ética, comprendiendo que la verdadera armonía no exige la complacencia superficial. Cuando maduran esta energía, se transforman en magníficos árbitros de la paz y estrategas del consenso, capaces de diseñar redes sociales y uniones verdaderamente justas, equitativas, bellas y civilizadas.</text:p>
      <text:p text:style-name="P1"/>
      <text:p text:style-name="P1">Urano en Escorpio</text:p>
      <text:p text:style-name="P1">Urano se encuentra en exaltación en Escorpio, manifestando una de las posiciones más poderosas, intensas, magnéticas y profundamente transformadoras de todo el zodiaco a nivel generacional. Este influjo revoluciona por completo los tabúes de la sociedad, la psicología profunda, la sexualidad, los misterios del esoterismo y la gestión estratégica de las finanzas y la energía nuclear o cuántica. Esta generación es la encargada de desenterrar las verdades ocultas del poder político y financiero mundial con la precisión de un detective cibernético. A nivel individual, otorga una intuición psíquica penetrante, una fuerza de voluntad indestructible y una resiliencia psicológica que permite al nativo renacer de sus propias cenizas tras crisis extremas o accidentes imprevistos. Su peligro radica en la desconfianza crónica, la paranoia tecnológica, el deseo de control invisible destructivo y una tendencia al autosabotaje mediante crisis emocionales cíclicas generadas por el pánico a perder el poder secreto sobre el entorno. Su gran reto evolutivo consiste en perdonar y canalizar su inmenso poder mental hacia la sanación colectiva. Cuando lo logran, se convierten en psicólogos profundos, científicos de vanguardia y sanadores capaces de guiar a la humanidad a través de las transmutaciones existenciales más duras con absoluta lucidez.</text:p>
      <text:p text:style-name="P1"/>
      <text:p text:style-name="P1">Urano en Sagitario</text:p>
      <text:p text:style-name="P1">Urano en Sagitario expande la mente colectiva a través de una revolución radical en los campos de la filosofía, la religión comparada, las leyes internacionales, la educación superior y los viajes de exploración física y espacial. Esta generación desafía los dogmas eclesiásticos y los sistemas académicos tradicionales mediante la introducción de filosofías universales de vanguardia, la globalización del conocimiento libre en redes y la búsqueda científica del significado de la existencia. Para el individuo, esta posición infunde un optimismo inquebrantable, un amor profundo por la libertad de pensamiento y un espíritu aventurero sin límites que detesta las fronteras geográficas o conceptuales. Su comunicación es directa, franca y sumamente entusiasta. Sin embargo, su principal debilidad es la falta de constancia frente a los detalles <text:soft-page-break/>cotidianos de la realidad material, la exageración de sus propias teorías revolucionarias y una marcada tendencia al dogmatismo utópico arrogante, creyendo que sus visiones del futuro son las únicas válidas para la humanidad. Su gran desafío consiste en aprender a estructurar su energía y validar los datos empíricos de la realidad. Cuando maduran, se transforman en profesores inspiradores y visionarios internacionales capaces de abrir las mentes hacia horizontes culturales totalmente renovados.</text:p>
      <text:p text:style-name="P1"/>
      <text:p text:style-name="P1">Urano en Capricornio</text:p>
      <text:p text:style-name="P1">Urano en Capricornio sacude los cimientos mismos de las instituciones gubernamentales, las estructuras políticas, la jerarquía corporativa tradicional y la administración de la ley a nivel global. Bajo este tránsito generacional, el choque entre la necesidad uraniana de revolución innovadora y la rigidez saturnina de las tradiciones da origen a reestructuraciones drásticas del estado, caídas de regímenes obsoletos y el nacimiento de economías de mercado basadas en la automatización ética y la descentralización estructural. A nivel individual, otorga una mente sumamente ambiciosa, disciplinada, realista y pragmática, capaz de diseñar planes de negocio vanguardistas con una cabeza fría admirable ante las crisis económicas severas. El peligro de esta posición radica en un autoritarismo tecnológico frío, el cinismo calculador maquiavélico y una tendencia a imponer el cambio social de forma tiránica o rígida, desatendiendo por completo las necesidades emocionales y humanas del colectivo por la obsesión enfermiza con la eficiencia estructural y el estatus profesional. Su aprendizaje es humanizar su ambición constructiva. Cuando lo logran, se transforman en los líderes ejecutivos y arquitectos más respetados, sólidos y valiosos del entramado profesional de la sociedad del futuro.</text:p>
      <text:p text:style-name="P1"/>
      <text:p text:style-name="P1">Urano en Acuario</text:p>
      <text:p text:style-name="P1">Urano se encuentra en su propio domicilio en Acuario, manifestando la esencia más pura de la genialidad tecnológica, la revolución científica, el progreso humanitario radical y el trabajo en redes colectivas democráticas. Esta era generacional marca el nacimiento de la era digital absoluta: la descentralización global del conocimiento, la conquista del espacio, la robótica avanzada y la creación de comunidades basadas en la fraternidad universal y la libertad total de pensamiento sin dogmas del pasado. Para el individuo, otorga una mente científica brillante, sumamente objetiva, lógica y desapegada de los prejuicios tradicionales, capaz de anticiparse a las necesidades de la humanidad con absoluta lucidez conceptual. Su talón de Aquiles es el desapego excesivo, que puede manifestarse como una frialdad impersonal o arrogancia intelectual distante ante el dolor o las necesidades afectivas individuales de su entorno cercano, cayendo con frecuencia en una terquedad ideológica fanática obsesionada con utopías conceptuales inaplicables en la realidad ordinaria. Su gran reto consiste en aprender a conectar la mente con el corazón cotidiano. Cuando lo consiguen, se transforman en los líderes indiscutibles del progreso humano y científico permanente.</text:p>
      <text:p text:style-name="P1"/>
      <text:p text:style-name="P1">Urano en Piscis</text:p>
      <text:p text:style-name="P1">Urano en Piscis introduce revoluciones místicas, innovaciones artísticas sublimes y una transformación radical en los campos de la psicología del inconsciente, el misticismo espiritual y la compasión universal colectiva. Bajo este influjo generacional, las fronteras entre la ciencia cuántica y la espiritualidad sutil comienzan a disolverse, dando paso a una comprensión científica de la telepatía, la sanación holística, la <text:soft-page-break/>música terapéutica y el cine de vanguardia metafórico. A nivel individual, dota al nativo de una sensibilidad psíquica e intuición prodigiosas, combinadas con una imaginación creativa desbordante que busca romper con los dogmas religiosos tradicionales para encontrar la unidad con el todo de forma independiente. El gran peligro de esta posición es la inacción crónica, la confusión mental caótica ante la sobreestimulación psíquica del entorno, y una tendencia alarmante al escapismo evasivo a través de fantasías utópicas o adicciones tecnológicas por el pánico a enfrentar la crudeza de la realidad material. Su desafío evolutivo consiste en aprender a enraizarse. Cuando lo logran, se transforman en canales de inspiración artística sublime, terapeutas excepcionales y guerreros de la paz con una capacidad sanadora infinita.</text:p>
      <text:p text:style-name="P1"/>
      <text:p text:style-name="P1">NEPTUNO EN LOS 12 SIGNOS</text:p>
      <text:p text:style-name="P1">Neptuno en Aries</text:p>
      <text:p text:style-name="P1">Neptuno en Aries idealiza la energía del guerrero, inspirando al colectivo humano a buscar la trascendencia espiritual, el arte y el misticismo a través de causas heroicas, revoluciones utópicas y un idealismo pionero sumamente apasionado. Bajo este influjo generacional, la sociedad sueña con líderes mesiánicos dotados de un coraje divino y busca romper de forma intuitiva con las estructuras del pasado mediante acciones independientes y audaces. A nivel individual, otorga una imaginación ardiente y una fe ciega en los propios instintos creativos, impulsando al nativo a sacrificarse de forma abnegada por ideales de libertad que considera sagrados. Sin embargo, su principal peligro radica en el fanatismo ideológico ciego, la confusión entre la agresividad destructiva y la cruzada espiritual, y una propensión a perseguir quimeras utópicas irrealizables que terminen en desilusiones dolorosas o en la victimización del propio ego ante la hostilidad del entorno real. Su gran reto evolutivo consiste en aprender a templar el fuego del idealismo con la paciencia estratégica y el realismo práctico. Cuando maduran esta energía neptuniana, se convierten en pioneros de una espiritualidad asertiva, capaces de iniciar movimientos de renovación cultural y artística con absoluta valentía y lucidez trascendente.</text:p>
      <text:p text:style-name="P1"/>
      <text:p text:style-name="P1">Neptuno en Tauro</text:p>
      <text:p text:style-name="P1">Neptuno en Tauro introduce los sueños de redención universal, el arte sublime y la idealización mística en el plano material, la economía tangible, la preservación de la naturaleza y los placeres sensoriales de la existencia. Bajo esta influencia generacional, la humanidad sueña con utopías económicas donde los recursos sean compartidos con absoluta fraternidad, floreciendo el arte arquitectónico de vanguardia inspirado en la geometría sagrada y una devoción espiritual profunda hacia los ciclos de la Tierra. A nivel individual, confiere un talento artístico y estético excepcional, una apreciación refinada por la música, la escultura y la ecología profunda, buscando construir refugios cómodos que simulen el paraíso terrenal. El gran peligro de este emplazamiento es la confusión financiera, la propensión a ser víctima de estafas o fraudes económicos por una total falta de realismo práctico en los negocios, o por el contrario, caer en un escapismo materialista basado en el lujo extravagante o la inercia perezosa para evadir las responsabilidades cotidianas. Su reto consiste en aprender a enraizar sus visiones artísticas sin perder el sentido común financiero. Cuando lo logran, se transforman en imanes de abundancia espiritual y creadores de estructuras estéticas y ecológicas verdaderamente duraderas y nutritivas.</text:p>
      <text:p text:style-name="P1"/>
      <text:p text:style-name="P1">Neptuno en Géminis</text:p>
      <text:p text:style-name="P1"><text:soft-page-break/>Neptuno en Géminis difumina las fronteras de la lógica lineal tradicional para sumergir a la mente colectiva en un océano de comunicación poética, narrativa metafórica, intuición lingüística y curiosidad versátil por los misterios del esoterismo. Esta generación idealiza el poder de la palabra escrita y hablada, soñando con sistemas educativos utópicos donde el conocimiento se transmita a través de la telepatía, el arte conceptual, la música y el intercambio democrático libre de información. A nivel individual, dota de una imaginación literaria brillante, un talento innato para la poesía, el cine, la imitación artística y la psicología asociativa sutil. El gran talón de Aquiles de Neptuno aquí es la marcada confusión mental, la dispersión conceptual crónica y una propensión alarmante a la distracción, el autoengaño verbal o la difusión involuntaria de mentiras y fake news debido a la falta de rigor empírico y objetividad lógica al procesar los datos de la realidad cotidiana. Su mente puede volverse sumamente caótica o ansiosa si no encuentra un anclaje realista. Su reto es enfocar su genialidad creativa. Cuando lo consiguen, se transforman en escritores influyentes y canales de una sabiduría empática excepcional capaz de conmover al colectivo.</text:p>
      <text:p text:style-name="P1"/>
      <text:p text:style-name="P1">Neptuno en Cáncer</text:p>
      <text:p text:style-name="P1">Neptuno en Cáncer se encuentra en una posición de gran afinidad elemental, idealizando al máximo los conceptos del hogar, la familia universal, las raíces afectivas de la infancia y la patria comunitaria. Bajo este tránsito generacional, la sociedad experimenta una profunda añoranza de seguridad emocional y sueña con la creación de refugios familiares idílicos libres de la crueldad del mundo exterior, floreciendo la psicología infantil, el misticismo doméstico y la protección abnegada de los desfavorecidos de la comunidad. A nivel del individuo, otorga una sensibilidad psíquica y una empatía oceánica que absorbe los estados de ánimo del entorno como una esponja sutil, dotando de una memoria romántica y nostálgica verdaderamente prodigiosa. El gran peligro de esta posición es el sentimentalismo manipulador, la dependencia afectiva asfixiante, el chovinismo exacerbado y una tendencia al escapismo emocional mediante la victimización o el repliegue excesivo dentro del caparazón por el pánico crónico al rechazo o al abandono. Su gran desafío evolutivo consiste en establecer fronteras psíquicas saludables. Cuando lo logran, manifiestan un amor incondicional universal y una capacidad terapéutica única para sanar corazones heridos y sostener estructuras familiares con una magia espiritual inigualable.</text:p>
      <text:p text:style-name="P1"/>
      <text:p text:style-name="P1">Neptuno en Leo</text:p>
      <text:p text:style-name="P1">Neptuno en Leo introduce los sueños de romance idílico, la idealización artística dramática, el orgullo noble y una creatividad mística sumamente magnética en el escenario de la conciencia colectiva. Esta generación sueña con eras doradas de esplendor cultural, monarquías espirituales sabias y revoluciones artísticas basadas en el teatro de la vanguardia, el cine dorado y la expresión apasionada del ego divino. A nivel individual, confiere un magnetismo personal arrollador, una imaginación creativa desbordante y una entrega romántica absoluta que busca proyectar en la pareja o en los proyectos creativos cualidades verdaderamente celestiales, viviendo el amor con una intensidad teatral y generosa. Sin embargo, su mayor peligro radica en la vanidad extravagante, el autoengaño egocéntrico, la megalomanía artística y una insaciable necesidad de validación y aplauso que los lleve a confundir la fantasía de su propia realeza con la dura realidad material, cayendo en desilusiones románticas severas si no reciben el trato idílico que esperan del entorno. Su aprendizaje consiste en desarrollar la humildad sincera del corazón. Cuando lo logran, se transforman en creadores brillantes, mentores generosos y faros de luz capaces de inspirar con su optimismo espiritual.</text:p>
      <text:p text:style-name="P1"><text:soft-page-break/></text:p>
      <text:p text:style-name="P1">Neptuno en Virgo</text:p>
      <text:p text:style-name="P1">Neptuno en Virgo se encuentra en detrimento y caída, lo que genera una tensión profunda entre la necesidad de disolución mística de este planeta y la obsesión por el análisis meticuloso, el orden práctico y el realismo crítico del signo de tierra. A nivel colectivogeneracional, esta posición se manifiesta como una idealización de la salud física, el perfeccionismo técnico en el trabajo cotidiano y la búsqueda utópica de la pureza ecológica y el servicio comunitario abnegado, floreciendo la medicina natural y la optimización de los procesos laborales a través de la devoción silenciosa. Para el individuo, otorga una mente sumamente atenta al detalle pero propensa a la hipocondría, la ansiedad por el control minucioso y una insatisfacción crónica generada por la incapacidad de manifestar la perfección idealizada de sus sueños en la realidad imperfecta de la materia cotidianas. Su peligro radica en el escepticismo materialista amargado o en caer en el rol de sirvientes sufridos de forma pasivo-agresiva, descuidando su propia salud por un perfeccionismo paralizante. Su reto es aceptar el flujo caótico natural de la existencia. Cuando equilibran esta faceta, se convierten en analistas excepcionales y técnicos con una sensibilidad sanadora incomparable.</text:p>
      <text:p text:style-name="P1"/>
      <text:p text:style-name="P1">Neptuno en Libra</text:p>
      <text:p text:style-name="P1">Neptuno en Libra idealiza al máximo los conceptos del matrimonio perfecto, las relaciones interpersonales armónicas, la diplomacia universal, la paz social y el refinamiento artístico y estético del colectivo humano. Bajo este tránsito generacional, la sociedad sueña con la unión mística ideal basada en la igualdad absoluta, la justicia ética y la cortesía innata, floreciendo grandes movimientos de paz internacional, el derecho humanitario y un auge extraordinario de las artes visuales y el diseño clásico refinado. A nivel individual, dota de un encanto personal exquisito, una elegancia natural y una propensión romántica sublime que busca la fusión total del alma con la pareja. El gran peligro de esta posición es la tendencia a la idealización excesiva del otro, lo que genera desilusiones amorosas dolorosas, una indecisión crónica paralizante por el miedo exagerado a romper la armonía social, y una complacencia superficial que los lleve a tolerar abusos o injusticias con tal de sostener una paz artificial en el vínculo. Su gran aprendizaje radica en desarrollar la asertividad ética. Cuando lo consiguen, se transforman en magníficos árbitros de la paz, diseñadores de la concordia y consejeros verdaderamente excepcionales.</text:p>
      <text:p text:style-name="P1"/>
      <text:p text:style-name="P1">Neptuno en Escorpio</text:p>
      <text:p text:style-name="P1">Neptuno en Escorpio sumerge la energía mística y disolvente de este planeta en el océano subterráneo de la intensidad emocional, la sexualidad sagrada, la psicología profunda, los tabúes y los procesos de transmutación espiritual colectiva. Esta generación idealiza el poder de la transformación psicológica, soñando con la fusión tántrica absoluta de los cuerpos y las almas, y buscando desentrañar los secretos ocultos de la vida y de la muerte a través del ocultismo y la investigación científica profunda de los misterios de la psique humana. Para el individuo, confiere una intuición psíquica penetrante, un magnetismo emocional arrollador y una resiliencia mística que le permite encontrar luz espiritual en los infiernos más oscuros de la experiencia existencial. Su peligro radica en la desconfianza crónica, la propensión al autoengaño a través de fijaciones obsesivas o celos manipuladores, y una tendencia alarmante al escapismo evasivo mediante adicciones emocionales o sexuales extremas por el pánico a perder el control secreto del entorno. Su reto es aprender a perdonar y soltar. Cuando lo logran, se <text:soft-page-break/>convierten en psicólogos profundos, terapeutas excepcionales y sanadores espirituales de un poder verdaderamente transformador e indestructible.</text:p>
      <text:p text:style-name="P1"/>
      <text:p text:style-name="P1">Neptuno en Sagitario</text:p>
      <text:p text:style-name="P1">Neptuno en Sagitario idealiza la búsqueda de la verdad universal, expandiendo la conciencia colectiva a través de sueños utópicos de libertad filosófica, religiones místicas sincréticas, fraternidad internacional sin fronteras y la exploración espiritual de culturas extranjeras. Bajo este influjo generacional, florecen grandes movimientos espirituales de la nueva era, la filosofía comparada en la educación superior y un optimismo entusiasta que sueña con leyes globales basadas en la moral divina y la ética cósmica. A nivel del individuo, otorga una fe inquebrantable en el futuro, un espíritu aventurero noble y un talento natural para la docencia inspiracional y la narrativa filosófica sublime. Sin embargo, su principal debilidad radica en la total falta de realismo práctico frente a los detalles de la vida material, una tendencia al dogmatismo arrogante o fanatismo místico ciego, creyendo que su visión teológica es la única verdad absoluta para la humanidad, pecando de un mesianismo charlatán si no se controlan. Su gran reto es aprender a enraizar sus visiones abstractas en la realidad cotidiana. Cuando maduran, se transforman en maestros del alma sabios y faros de inspiración espiritual incomparables.</text:p>
      <text:p text:style-name="P1"/>
      <text:p text:style-name="P1">Neptuno en Capricornio</text:p>
      <text:p text:style-name="P1">Neptuno en Capricornio introduce los sueños utópicos, las visiones artísticas y la idealización mística en las estructuras políticas más rígidas, los gobiernos, la jerarquía corporativa tradicional y la administración de la ley a nivel global. Esta generación sueña con la creación de estados perfectos basados en el orden ético, la responsabilidad social corporativa y el uso espiritual y equitativo del poder y el estatus profesional, difuminando las fronteras entre el pragmatismo material y el bienestar místico del colectivo humano. A nivel individual, otorga una mente sumamente disciplinada pero dotada de una intuición arquitectónica brillante, capaz de dar forma física a proyectos creativos o empresariales complejos con paciencia y realismo estratégico duraderos. El peligro de esta posición radica en un pesimismo rígido o en sufrir de desilusiones severas ante la corrupción de las instituciones tradicionales del mundo real, cayendo en la apatía social, la confusión de metas profesionales o utilizando el cinismo calculador como mecanismo de escape de las realidades materiales. Su aprendizaje es humanizar su ambición práctica. Cuando lo logran, se convierten en los líderes estructurales, ejecutivos y constructores más respetados, sólidos y éticos de la sociedad.</text:p>
      <text:p text:style-name="P1"/>
      <text:p text:style-name="P1">Neptuno en Acuario</text:p>
      <text:p text:style-name="P1">Neptuno en Acuario idealiza la mente científica colectiva, los proyectos humanitarios, el progreso tecnológico de vanguardia y los ideales de fraternidad universal e igualdad democrática en red. Bajo este tránsito generacional, la humanidad sueña con utopías futuristas donde la inteligencia artificial, la energía cuántica y las redes de conocimiento libre disuelvan la pobreza y unan a todas las culturas del planeta en una sola hermandad tecnológica libre de dogmas del pasado. Para el individuo, confiere una mente brillante, abierta e innovadora dotada de una intuición científica e independencia intelectual extraordinarias, destacando en el activismo social vanguardista y el diseño de proyectos colectivos. Su talón de Aquiles es el desapego emocional excesivo, que puede manifestarse como una frialdad impersonal o <text:soft-page-break/>autoengaño en teorías utópicas inaplicables en la realidad práctica de las personas comunes, cayendo en un fanatismo conceptual ciego que ignore las necesidades afectivas individuales del entorno íntimo cercano. Su reto radica en humanizar sus visiones lógicas. Cuando lo consiguen, se transforman en líderes revolucionarios del progreso científico y social, diseñando redes de conocimiento transformadoras.</text:p>
      <text:p text:style-name="P1"/>
      <text:p text:style-name="P1">Neptuno en Piscis</text:p>
      <text:p text:style-name="P1">Neptuno se encuentra en su propio domicilio en Piscis, manifestando la esencia más pura, oceánica, mística, compasiva y artísticamente sublime de este planeta a nivel generacional. Aquí, los sueños colectivos, la intuición psíquica, la disolución de las fronteras del ego y el amor incondicional universal alcanzan su máxima expansión histórica, floreciendo un renacimiento extraordinario de la música espiritual, las artes visuales metafóricas, la psicología profunda y la sanación holística comunitaria. El individuo posee una sensibilidad extrema y una empatía infinita que lo conecta directamente con el inconsciente colectivo, actuando como un barómetro psíquico de la humanidad dotado de una imaginación poética divina. Su gran debilidad es la total falta de límites emocionales, la confusión mental caótica ante la crudeza del mundo material, y una propensión alarmante al escapismo evasivo a través de fantasías utópicas o adicciones graves por el pánico a asumir el sufrimiento del entorno físico real, adoptando el rol de víctimas indefensas. Su gran desafío consiste en aprender a poner fronteras psíquicas saludables. Cuando lo logra, despliega una sabiduría espiritual infinita, convirtiéndose en faro de paz, misticismo y sanación profunda.</text:p>
      <text:p text:style-name="P1"/>
      <text:p text:style-name="P1">PLUTÓN EN LOS 12 SIGNOS</text:p>
      <text:p text:style-name="P1">Plutón en Aries</text:p>
      <text:p text:style-name="P1">Plutón en Aries transforma de manera radical e irreversible la conciencia colectiva a través de eras de destrucción y renacimiento de las estructuras basadas en el poder individual, el liderazgo militar, la iniciativa independiente y el coraje bélico de la humanidad. Esta generación posee una fuerza de voluntad y una determinación implacables que se manifiestan como una energía volcánica: destruyen los viejos dogmas de la autoridad tradicional mediante revoluciones asertivas drásticas y guerras ideológicas extremas para forjar una nueva noción de soberanía personal basada en la autosuficiencia. A nivel individual, otorga una resiliencia física y psicológica indestructible, capacitando al nativo para liderar transformaciones profundas en entornos hostiles con un coraje que roza la temeridad absoluta. El peligro principal de este emplazamiento es la propensión a la agresividad destructiva implacable, el autoritarismo egocéntrico feroz y una obsesión enfermiza con imponer su voluntad por la fuerza bruta, desatendiendo por completo las necesidades logísticas de la cooperación social. Su reto consiste en desarrollar la paciencia estratégica y la diplomacia. Cuando maduran, se transforman en pioneros históricos capaces de reconstruir sociedades enteras desde los cimientos con absoluta lucidez conceptual.</text:p>
      <text:p text:style-name="P1"/>
      <text:p text:style-name="P1">Plutón en Tauro</text:p>
      <text:p text:style-name="P1">Plutón en Tauro introduce procesos de transformación profunda, crisis extremas y regeneraciones estructurales irreversibles en los cimientos más sólidos del mundo material: el sistema financiero global, la economía bancaria, la propiedad de la tierra, la agricultura y el concepto mismo de riqueza y supervivencia física. Bajo este tránsito de larga duración, las antiguas formas de acumulación de bienes sufren colapsos <text:soft-page-break/>severos para dar origen a nuevos modelos de gestión de recursos basados en la ecología estratégica, la descentralización monetaria y el uso tecnológico ético de la materia terrestre. A nivel del individuo, otorga una paciencia obstinada, una resistencia física admirable y una ambición implacable para construir imperios económicos estables mediante el esfuerzo perseverante paso a paso. El gran peligro de esta posición es la codicia exacerbada, la tacañería extrema, una terquedad absoluta ante cualquier cambio de metodología laboral, y una obsesión enfermiza con el control de los bienes tangibles que los lleve a la ruina por el pánico crónico a la carencia material. Su reto evolutivo consiste en soltar el control y comprender el valor espiritual del desapego práctico. Cuando logran equilibrar esta faceta plutoniana, se convierten en arquitectos financieros indestructibles.</text:p>
      <text:p text:style-name="P1"/>
      <text:p text:style-name="P1">Plutón en Géminis</text:p>
      <text:p text:style-name="P1">Plutón en Géminis reconfigura y transforma de manera radical los sistemas de pensamiento de la humanidad, las telecomunicaciones globales, la educación elemental, la prensa y el uso estratégico de la información como herramienta de control o de liberación del colectivo. Esta era generacional destruye los antiguos dogmas educativos y lingüísticos tradicionales para dar origen a revoluciones de la información digital, espionaje cibernético internacional y una redefinición científica de la lógica y la propaganda psicológica de masas. A nivel individual, confiere una mente detectivesca brillante, dotada de un ingenio verbal afilado como un bisturí y una capacidad única para descifrar secretos y motivaciones inconscientes detrás de cualquier discurso lógico del entorno social. Su principal debilidad es el cinismo intelectual destructivo, la propensión a la manipulación verbal oculta, la desconfianza crónica y una ansiedad nerviosa severa provocada por fijaciones obsesivas de la mente que los lleven a utilizar los datos de la realidad cotidiana como armas de poder psicológico en sus relaciones. Su gran reto es enfocar su mente brillante hacia la transmisión de la verdad ética. Cuando lo consiguen, se transforman en escritores influyentes y analistas extraordinarios capaces de revolucionar el conocimiento humano.</text:p>
      <text:p text:style-name="P1"/>
      <text:p text:style-name="P1">Plutón en Cáncer</text:p>
      <text:p text:style-name="P1">Plutón en Cáncer introduce procesos de destrucción dramática y renacimiento psicológico profundo en las estructuras más íntimas de la humanidad: la familia tradicional, el hogar doméstico, las raíces genealógicas, la vivienda comunitaria y el concepto mismo de patriotismo y seguridad emocional del colectivo. Durante esta era histórica, las antiguas nociones de clan sufren crisis internas extremas debido a colapsos demográficos o migraciones masivas, forzando a la sociedad a regenerar sus cimientos emocionales mediante la creación de modelos de protección comunitaria más inclusivos y resilientes. Para el individuo, otorga una intuición psíquica penetrante y una intensidad emocional subterránea e inquebrantable para proteger sus raíces y a sus seres queridos ante cualquier amenaza del entorno exterior hostil. El gran peligro de este emplazamiento radica en la desconfianza nacionalista exacerbada, el chantaje emocional destructivo, los celos posesivos dentro del hogar y una obsesión enfermiza con reprimir la vulnerabilidad por el miedo crónico al abandono o a la traición del entorno íntimo. Su reto consiste en perdonar el pasado familiar. Cuando lo logran, se transforman en pilares de estabilidad emocional inquebrantable, ofreciendo una capacidad terapéutica y un amor sumamente protector y sanador.</text:p>
      <text:p text:style-name="P1"/>
      <text:p text:style-name="P1">Plutón en Leo</text:p>
      <text:p text:style-name="P1"><text:soft-page-break/>Plutón en Leo desata una transformación radical, crisis de poder extremas y regeneraciones profundas en las áreas del liderazgo político, la expresión artística, el orgullo del ego y la soberanía creativa del colectivo humano. Esta era generacional marca el nacimiento y la caída de regímenes autoritarios centralizados, tiranías políticas y revoluciones culturales drásticas que desafían el concepto del poder absoluto encarnado en un solo líder divino, forzando a la humanidad a redefinir el autorespeto colectivo. A nivel individual, confiere un magnetismo personal arrollador, una fuerza de voluntad indomable y una ambición creativa desbordante que busca dejar una huella histórica indeleble en escenarios públicos o empresariales de vanguardia, creciendo de forma asombrosa ante los desafíos competitivos más severos del entorno. Su mayor peligro es la megalomanía destructiva, un egocentrismo tiránico implacable, la vanidad extrema y una intolerancia absoluta hacia la crítica o la derrota práctica que los lleve a caer en rabietas teatrales destructivas por el pánico a perder el control social. Su aprendizaje consiste en desarrollar la humildad sincera. Cuando lo consiguen, se transforman en directores excepcionales y mentores dotados de una integridad y magnetismo verdaderamente inspiradores.</text:p>
      <text:p text:style-name="P1"/>
      <text:p text:style-name="P1">Plutón en Virgo</text:p>
      <text:p text:style-name="P1">Plutón en Virgo canaliza su inmenso poder de transformación y regeneración radical a través de los campos de la medicina científica profunda, la automatización industrial, el mercado laboral cotidiano, la ecología y la optimización rigurosa de los procesos técnicos responsables de la sociedad. Esta generación revoluciona la salud humana mediante el descubrimiento de la manipulación genética, la biotecnología celular, el control de plagas y la reestructuración drástica de los derechos de los trabajadores frente a la mecanización del entramado profesional. Otorga al individuo una mente analítica detectivesca impecable, obsesionada con el orden lógico, el control de calidad riguroso y la resolución de crisis prácticas de alta complejidad con absoluta frialdad estratégica. El talón de Aquiles de Plutón aquí es la propensión crónica al estrés laboral extremo, la hipocondría obsesiva destructiva y un perfeccionismo paralizante que degenere en una crítica mordaz hacia ellos mismos y hacia el entorno, saboteando los proyectos cotidianos por la ansiedad de controlarlo todo minuciosamente. Su gran desafío consiste en aprender a delegar con confianza. Cuando equilibran esta faceta, se convierten en los analistas, científicos e ingenieros más valiosos de la realidad industrial y médica.</text:p>
      <text:p text:style-name="P1"/>
      <text:p text:style-name="P1">Plutón en Libra</text:p>
      <text:p text:style-name="P1">Plutón en Libra transforma de manera radical e irreversible las dinámicas de las relaciones interpersonales, los contratos legales, los tratados de paz de la diplomacia internacional, el matrimonio y el concepto mismo de justicia ética y equilibrio social de la humanidad. Bajo este tránsito generacional, los antiguos modelos de unión conyugal basados en la conveniencia patriarcal o en la dependencia socioeconómica sufren crisis internas extremas y colapsos legales para dar origen a legislaciones vanguardistas basadas en la equidad absoluta de derechos y la autonomía de las partes contractuales. Para el individuo, otorga un encanto diplomático magnético combinados con un pensamiento estratégico penetrante, capaz de mediar en conflictos de alta complejidad con absoluta cabeza fría. Su peligro radica en la desconfianza crónica hacia los vínculos amorosos, una tendencia a la manipulación psicológica sutil o al control invisible de la pareja por el pánico a ser dominado o traicionado, cayendo en una complacencia destructiva pasivo-agresiva que termine en rupturas legales violentas. Su gran aprendizaje consiste en desarrollar la asertividad ética. Cuando lo logran, se transforman en magníficos jueces y árbitros de la paz estables y verdaderamente civilizados.</text:p>
      <text:p text:style-name="P1"><text:soft-page-break/></text:p>
      <text:p text:style-name="P1">Plutón en Escorpio</text:p>
      <text:p text:style-name="P1">Plutón se encuentra en su propio domicilio en Escorpio, manifestando la máxima expresión de la intensidad emocional subterránea, el poder de transmutación psicológica, la resiliencia indestructible y las crisis existenciales extremas a nivel generacional. Esta era histórica sacude los cimientos del planeta mediante revoluciones drásticas en el manejo de la energía nuclear, crisis de deudas financieras globales complejas, descubrimientos profundos en la virología de la medicina científica y la desmitificación total de los tabúes de la sexualidad humana y la muerte del ego social. A nivel individual, dota al nativo de una mente de rayos X brillante, un magnetismo personal misterioso y una fuerza de voluntad obsesiva que le permite superar traumas psicológicos y crisis financieras extremas que destruirían a cualquiera. El gran peligro de este emplazamiento es la paranoia destructiva, el deseo de control secreto absoluto, los celos posesivos implacables y una tendencia alarmante al autosabotaje a través de venganzas frías y calculadas generadas por la desconfianza crónica del entorno. Su reto consiste en aprender a perdonar y soltar. Cuando lo consiguen, se transforman en psicólogos profundos, financieros impecables y sanadores espirituales indestructibles.</text:p>
      <text:p text:style-name="P1"/>
      <text:p text:style-name="P1">Plutón en Sagitario</text:p>
      <text:p text:style-name="P1">Plutón en Sagitario introduce procesos de destrucción dramática y regeneración radical en los campos de las religiones tradicionales, las leyes universales de la justicia, la educación superior académica, la moral ética y las fronteras de la globalización cultural del colectivo humano. Durante esta era histórica, las iglesias ortodoxas y los dogmas teológicos tradicionales sufren crisis de corrupción severas y colapsos de credibilidad, forzando al nacimiento de espiritualidades universales libres basadas en la ciencia sutil, la filosofía comparada y una redefinición de la legislación internacional humanitaria. Para el individuo, infunde una fe inquebrantable en su propia verdad conceptual, un espíritu aventurero noble y una ambición filosófica implacable orientada a expandir horizontes intelectuales de forma estratégica con absoluta convicción. Su principal peligro radica en el fanatismo ideológico ciego, el dogmatismo dogmático arrogante o caer en un mesianismo político destructivo, creyendo que sus principios morales son las únicas verdades absolutas que deben ser impuestas a la humanidad por la fuerza de la propaganda. Su gran desafío consiste en aprender a respetar la alteridad conceptual de la realidad cotidiana. Cuando maduran, se transforman en maestros inspiradores excepcionales.</text:p>
      <text:p text:style-name="P1"/>
      <text:p text:style-name="P1">Plutón en Capricornio</text:p>
      <text:p text:style-name="P1">Plutón en Capricornio sacude, destruye y reconstruye desde los cimientos más profundos del planeta las estructuras de los gobiernos estatales, las instituciones políticas internacionales, la jerarquía bancaria global y el ejercicio del poder corporativo tradicional. Bajo este tránsito generacional de alta intensidad práctica, el colapso económico de los modelos financieros centralizados obsoletos y la caída de regímenes burocráticos rígidos forzan a la sociedad a regenerar sus leyes administrativas mediante la descentralización ética, la automatización industrial transparente y el respeto por el esfuerzo productivo real. A nivel del individuo, confiere una mente sumamente disciplinada, ambiciosa, realista y dotada de un pragmatismo y cabeza fría excepcionales ante las peores crisis logísticas del entorno laboral profesional. El peligro de esta posición radica en el autoritarismo corporativo implacable, el cinismo calculador maquiavélico y una obsesión enfermiza con el estatus social y el éxito práctico donde el fin justifique los <text:soft-page-break/>medios más oscuros, reprimiendo su salud por el control social absoluto. Su aprendizaje es humanizar su ambición. Cuando lo logran, se convierten en los líderes estructurales y constructores más respetados, sólidos y valiosos de la sociedad.</text:p>
      <text:p text:style-name="P1"/>
      <text:p text:style-name="P1">Plutón en Acuario</text:p>
      <text:p text:style-name="P1">Plutón en Acuario revoluciona de forma irreversible y radical las dinámicas de los grupos sociales, las redes tecnológicas de comunicación global, el progreso científico humanitario y las causas del activismo democrático del colectivo humano. Esta era generacional destruye el control monopolizado de la tecnología digital para forjar revoluciones de conocimiento libre, descentralización absoluta en redes cooperativas multidisciplinarias, el auge de la energía cuántica limpia y una redefinición de la fraternidad universal sin dictaduras del pasado. Para el individuo, otorga una mente brillante, objetiva, lógica y desapegada dotada de una independencia intelectual extraordinaria, capaz de diseñar herramientas tecnológicas disruptivas y anticiparse al futuro con absoluta lucidez conceptual. Su talón de Aquiles es la frialdad impersonal destructiva, la terquedad ideológica utópica y una propensión a la manipulación oculta de las masas a través de redes informáticas por el pánico a perder el control o la autonomía ideológica dentro del colectivo social. Su gran reto consiste en integrar la mente con el corazón cotidiano. Cuando lo consiguen, se transforman en líderes indiscutibles del progreso científico y social duradero.</text:p>
      <text:p text:style-name="P1"/>
      <text:p text:style-name="P1">Plutón en Piscis</text:p>
      <text:p text:style-name="P2"><text:span text:style-name="T1">Plutón en Piscis introduce procesos de transmutación espiritual profunda, disolución mística radical y regeneraciones irreversibles en el océano de la sensibilidad artística, la psicología del inconsciente colectivo, las instituciones de caridad y la compasión universal humana. Bajo este tránsito generacional de cierre de ciclo cósmico, los antiguos dogmas del esoterismo y las religiones devocionales sufren colapsos severos para dar paso a un renacimiento extraordinario de las artes visuales metafóricas, la música terapéutica cuántica y la medicina psicológica holística basada en el alma sutil. A nivel individual, confiere una sensibilidad psíquica y una intuición penetrante prodigiosas, combinadas con una resiliencia mística que le permite al nativo transmutar dolores ajenos y traumas emocionales colectivos en obras artísticas sublimes con absoluta fe espiritual. Su peligro radica en la inacción caótica, la confusión mental por el pánico a ser manipulado psíquicamente, y una tendencia alarmante al escapismo evasivo a través de fantasías utópicas extremas o adicciones graves por la incapacidad de enfrentar la crudeza de la realidad material cotidiana. Su desafío es enraizarse. Cuando lo logran, se convierten en canales de inspiración artística, misticismo y sanación infinita.<text:line-break/><text:line-break/><text:line-break/></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7-05T19:39:51.086000000</dc:date>
    <meta:editing-duration>PT31M7S</meta:editing-duration>
    <meta:editing-cycles>1</meta:editing-cycles>
    <meta:document-statistic meta:table-count="0" meta:image-count="0" meta:object-count="0" meta:page-count="45" meta:paragraph-count="266" meta:word-count="23160" meta:character-count="154618" meta:non-whitespace-character-count="131715"/>
    <meta:generator>LibreOffice/7.2.0.4$Windows_x86 LibreOffice_project/9a9c6381e3f7a62afc1329bd359cc48accb6435b</meta:generator>
  </office:meta>
</office:document-meta>
</file>